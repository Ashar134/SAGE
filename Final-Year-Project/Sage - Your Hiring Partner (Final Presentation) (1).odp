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jpeg" manifest:media-type="image/jpe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in, 0in, 0in, 0in)" draw:stroke="none" draw:imag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220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22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22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22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22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22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220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701">
      <style:text-properties fo:font-size="0.15278in" style:font-size-asian="0.15278in" style:font-size-complex="0.15278in" fo:language="en" fo:country="US"/>
    </style:style>
    <style:style style:family="paragraph" style:name="a1702">
      <style:paragraph-properties fo:text-align="left"/>
    </style:style>
    <style:style style:family="table-cell" style:name="a1703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able-row" style:name="a1704">
      <style:table-row-properties style:row-height="0.55058in"/>
    </style:style>
    <style:style style:family="text" style:name="a1705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1706">
      <style:text-properties fo:font-size="0.14583in" style:font-size-asian="0.14583in" style:font-size-complex="0.14583in" fo:language="en" fo:country="US" fo:font-weight="bold" style:font-weight-asian="bold" style:font-weight-complex="bold"/>
    </style:style>
    <style:style style:family="paragraph" style:name="a1707">
      <style:paragraph-properties fo:text-align="left"/>
    </style:style>
    <style:style style:family="table-cell" style:name="a17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09">
      <style:text-properties fo:font-size="0.15278in" style:font-size-asian="0.15278in" style:font-size-complex="0.15278in" fo:language="en" fo:country="US"/>
    </style:style>
    <style:style style:family="text" style:name="a1710">
      <style:text-properties fo:font-size="0.14583in" style:font-size-asian="0.14583in" style:font-size-complex="0.14583in" fo:language="en" fo:country="US"/>
    </style:style>
    <style:style style:family="paragraph" style:name="a1711">
      <style:paragraph-properties fo:text-align="left"/>
    </style:style>
    <style:style style:family="table-cell" style:name="a1712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713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714">
      <style:paragraph-properties fo:text-align="left"/>
    </style:style>
    <style:style style:family="table-cell" style:name="a1715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716">
      <style:text-properties fo:font-size="0.15278in" style:font-size-asian="0.15278in" style:font-size-complex="0.15278in" fo:language="en" fo:country="US"/>
    </style:style>
    <style:style style:family="paragraph" style:name="a1717">
      <style:paragraph-properties fo:text-align="left"/>
    </style:style>
    <style:style style:family="table-cell" style:name="a1718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able-row" style:name="a1719">
      <style:table-row-properties style:row-height="0.26135in"/>
    </style:style>
    <style:style style:family="text" style:name="a1400">
      <style:text-properties fo:font-size="0.22222in" style:font-size-asian="0.22222in" style:font-size-complex="0.22222in" fo:language="en" fo:country="US"/>
    </style:style>
    <style:style style:family="paragraph" style:name="a1401">
      <style:paragraph-properties/>
    </style:style>
    <style:style style:family="table-cell" style:name="a140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03">
      <style:text-properties fo:font-size="0.22222in" style:font-size-asian="0.22222in" style:font-size-complex="0.22222in" fo:language="en" fo:country="US"/>
    </style:style>
    <style:style style:family="paragraph" style:name="a1404">
      <style:paragraph-properties/>
    </style:style>
    <style:style style:family="table-cell" style:name="a140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06">
      <style:text-properties fo:color="#ffffff" fo:font-size="0.22222in" style:font-size-asian="0.22222in" style:font-size-complex="0.22222in" fo:language="en" fo:country="US"/>
    </style:style>
    <style:style style:family="paragraph" style:name="a1407">
      <style:paragraph-properties/>
    </style:style>
    <style:style style:family="table-cell" style:name="a140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09">
      <style:text-properties fo:color="#ffffff" fo:font-size="0.22222in" style:font-size-asian="0.22222in" style:font-size-complex="0.22222in" fo:language="en" fo:country="US"/>
    </style:style>
    <style:style style:family="text" style:name="a1720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1721">
      <style:text-properties fo:font-size="0.15278in" style:font-size-asian="0.15278in" style:font-size-complex="0.15278in" fo:language="en" fo:country="US"/>
    </style:style>
    <style:style style:family="paragraph" style:name="a1722">
      <style:paragraph-properties fo:text-align="left"/>
    </style:style>
    <style:style style:family="table-cell" style:name="a1723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724">
      <style:text-properties fo:font-size="0.15278in" style:font-size-asian="0.15278in" style:font-size-complex="0.15278in" fo:language="en" fo:country="US"/>
    </style:style>
    <style:style style:family="paragraph" style:name="a1725">
      <style:paragraph-properties fo:text-align="left"/>
    </style:style>
    <style:style style:family="table-cell" style:name="a172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727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728">
      <style:paragraph-properties fo:text-align="left"/>
    </style:style>
    <style:style style:family="table-cell" style:name="a172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1410">
      <style:paragraph-properties/>
    </style:style>
    <style:style style:family="table-cell" style:name="a141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12">
      <style:text-properties fo:font-size="0.22222in" style:font-size-asian="0.22222in" style:font-size-complex="0.22222in" fo:language="en" fo:country="US"/>
    </style:style>
    <style:style style:family="paragraph" style:name="a1413">
      <style:paragraph-properties/>
    </style:style>
    <style:style style:family="table-cell" style:name="a1414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415">
      <style:text-properties fo:font-size="0.22222in" style:font-size-asian="0.22222in" style:font-size-complex="0.22222in" fo:language="en" fo:country="US"/>
    </style:style>
    <style:style style:family="paragraph" style:name="a1416">
      <style:paragraph-properties/>
    </style:style>
    <style:style style:family="table-cell" style:name="a141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row" style:name="a1418">
      <style:table-row-properties style:row-height="0.64662in"/>
    </style:style>
    <style:style style:family="text" style:name="a1419">
      <style:text-properties fo:font-size="0.22222in" style:font-size-asian="0.22222in" style:font-size-complex="0.22222in" fo:language="en" fo:country="US"/>
    </style:style>
    <style:style style:family="table-cell" style:name="a1100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01">
      <style:text-properties fo:font-size="0.22222in" style:font-size-asian="0.22222in" style:font-size-complex="0.22222in" fo:language="en" fo:country="US"/>
    </style:style>
    <style:style style:family="paragraph" style:name="a1102">
      <style:paragraph-properties/>
    </style:style>
    <style:style style:family="table-cell" style:name="a110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04">
      <style:text-properties fo:font-size="0.22222in" style:font-size-asian="0.22222in" style:font-size-complex="0.22222in" fo:language="en" fo:country="US"/>
    </style:style>
    <style:style style:family="paragraph" style:name="a1105">
      <style:paragraph-properties/>
    </style:style>
    <style:style style:family="text" style:name="a1730">
      <style:text-properties fo:font-size="0.15278in" style:font-size-asian="0.15278in" style:font-size-complex="0.15278in" fo:language="en" fo:country="US"/>
    </style:style>
    <style:style style:family="table-cell" style:name="a110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1731">
      <style:paragraph-properties fo:text-align="left"/>
    </style:style>
    <style:style style:family="text" style:name="a1107">
      <style:text-properties fo:font-size="0.22222in" style:font-size-asian="0.22222in" style:font-size-complex="0.22222in" fo:language="en" fo:country="US"/>
    </style:style>
    <style:style style:family="table-cell" style:name="a1732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1108">
      <style:paragraph-properties/>
    </style:style>
    <style:style style:family="table-row" style:name="a1733">
      <style:table-row-properties style:row-height="0.26135in"/>
    </style:style>
    <style:style style:family="table-cell" style:name="a110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734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aragraph" style:name="a1735">
      <style:paragraph-properties fo:text-align="left"/>
    </style:style>
    <style:style style:family="table-cell" style:name="a173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737">
      <style:text-properties fo:font-size="0.15278in" style:font-size-asian="0.15278in" style:font-size-complex="0.15278in" fo:language="en" fo:country="US"/>
    </style:style>
    <style:style style:family="paragraph" style:name="a1738">
      <style:paragraph-properties fo:text-align="left"/>
    </style:style>
    <style:style style:family="table-cell" style:name="a173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1420">
      <style:paragraph-properties fo:text-align="left"/>
    </style:style>
    <style:style style:family="table-cell" style:name="a142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22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423">
      <style:paragraph-properties/>
    </style:style>
    <style:style style:family="table-cell" style:name="a142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25">
      <style:text-properties fo:font-size="0.22222in" style:font-size-asian="0.22222in" style:font-size-complex="0.22222in" fo:language="en" fo:country="US"/>
    </style:style>
    <style:style style:family="paragraph" style:name="a1426">
      <style:paragraph-properties/>
    </style:style>
    <style:style style:family="table-cell" style:name="a142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28">
      <style:text-properties fo:font-size="0.22222in" style:font-size-asian="0.22222in" style:font-size-complex="0.22222in" fo:language="en" fo:country="US"/>
    </style:style>
    <style:style style:family="paragraph" style:name="a1429">
      <style:paragraph-properties/>
    </style:style>
    <style:style style:family="text" style:name="a1110">
      <style:text-properties fo:font-size="0.22222in" style:font-size-asian="0.22222in" style:font-size-complex="0.22222in" fo:language="en" fo:country="US"/>
    </style:style>
    <style:style style:family="paragraph" style:name="a1111">
      <style:paragraph-properties/>
    </style:style>
    <style:style style:family="table-cell" style:name="a111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13">
      <style:text-properties fo:font-size="0.22222in" style:font-size-asian="0.22222in" style:font-size-complex="0.22222in" fo:language="en" fo:country="US"/>
    </style:style>
    <style:style style:family="paragraph" style:name="a1114">
      <style:paragraph-properties/>
    </style:style>
    <style:style style:family="table-cell" style:name="a111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740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1116">
      <style:text-properties fo:font-size="0.22222in" style:font-size-asian="0.22222in" style:font-size-complex="0.22222in" fo:language="en" fo:country="US"/>
    </style:style>
    <style:style style:family="paragraph" style:name="a1741">
      <style:paragraph-properties fo:text-align="left"/>
    </style:style>
    <style:style style:family="paragraph" style:name="a1117">
      <style:paragraph-properties/>
    </style:style>
    <style:style style:family="table-cell" style:name="a1742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900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743">
      <style:text-properties fo:font-size="0.15278in" style:font-size-asian="0.15278in" style:font-size-complex="0.15278in" fo:language="en" fo:country="US"/>
    </style:style>
    <style:style style:family="table-row" style:name="a1119">
      <style:table-row-properties style:row-height="0.73743in"/>
    </style:style>
    <style:style style:family="paragraph" style:name="a1744">
      <style:paragraph-properties fo:text-align="left"/>
    </style:style>
    <style:style style:family="graphic" style:name="a902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f22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745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747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906" style:parent-style-name="Graphics">
      <style:graphic-properties draw:fill="none" draw:stroke="non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f22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4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ell" style:name="a143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31">
      <style:text-properties fo:font-size="0.22222in" style:font-size-asian="0.22222in" style:font-size-complex="0.22222in" fo:language="en" fo:country="US"/>
    </style:style>
    <style:style style:family="paragraph" style:name="a1432">
      <style:paragraph-properties/>
    </style:style>
    <style:style style:family="table-cell" style:name="a1433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434">
      <style:text-properties fo:font-size="0.22222in" style:font-size-asian="0.22222in" style:font-size-complex="0.22222in" fo:language="en" fo:country="US"/>
    </style:style>
    <style:style style:family="paragraph" style:name="a1435">
      <style:paragraph-properties/>
    </style:style>
    <style:style style:family="table-cell" style:name="a1436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437">
      <style:text-properties fo:font-size="0.22222in" style:font-size-asian="0.22222in" style:font-size-complex="0.22222in" fo:language="en" fo:country="US"/>
    </style:style>
    <style:style style:family="paragraph" style:name="a1438">
      <style:paragraph-properties/>
    </style:style>
    <style:style style:family="table-cell" style:name="a143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20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21">
      <style:paragraph-properties fo:text-align="left"/>
    </style:style>
    <style:style style:family="table-cell" style:name="a112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23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24">
      <style:paragraph-properties/>
    </style:style>
    <style:style style:family="table-cell" style:name="a112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" style:name="a1750">
      <style:table-properties style:writing-mode="lr-tb"/>
    </style:style>
    <style:style style:family="text" style:name="a1126">
      <style:text-properties fo:font-size="0.22222in" style:font-size-asian="0.22222in" style:font-size-complex="0.22222in" fo:language="en" fo:country="US"/>
    </style:style>
    <style:style style:family="table-column" style:name="a1751">
      <style:table-column-properties style:column-width="3.79774in"/>
    </style:style>
    <style:style style:family="paragraph" style:name="a1127">
      <style:paragraph-properties/>
    </style:style>
    <style:style style:family="table-column" style:name="a1752">
      <style:table-column-properties style:column-width="3.79774in"/>
    </style:style>
    <style:style style:family="presentation" style:name="a9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2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column" style:name="a1753">
      <style:table-column-properties style:column-width="3.79774in"/>
    </style:style>
    <style:style style:family="presentation" style:name="a91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29">
      <style:text-properties fo:font-size="0.22222in" style:font-size-asian="0.22222in" style:font-size-complex="0.22222in" fo:language="en" fo:country="US"/>
    </style:style>
    <style:style style:family="table-row" style:name="a1754">
      <style:table-row-properties style:row-height="0.46862in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language="en" fo:country="US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language="en" fo:country="US"/>
    </style:style>
    <style:style style:family="presentation" style:name="a917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9">
      <style:paragraph-properties/>
    </style:style>
    <style:style style:family="graphic" style:name="a918" style:parent-style-name="Graphics">
      <style:graphic-properties draw:fill="none" fo:clip="rect(0in, 0in, 0in, 0in)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size="0.22222in" style:font-size-asian="0.22222in" style:font-size-complex="0.22222in" fo:language="en" fo:country="US"/>
    </style:style>
    <style:style style:family="paragraph" style:name="a1441">
      <style:paragraph-properties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01">
      <style:paragraph-properties fo:line-height="90%" fo:text-align="left" style:tab-stop-distance="1in" fo:margin-left="0.62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size="0.22222in" style:font-size-asian="0.22222in" style:font-size-complex="0.22222in" fo:language="en" fo:country="US"/>
    </style:style>
    <style:style style:family="paragraph" style:name="a1444">
      <style:paragraph-properties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5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paragraph" style:name="a604">
      <style:paragraph-properties fo:line-height="95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size="0.22222in" style:font-size-asian="0.22222in" style:font-size-complex="0.22222in" fo:language="en" fo:country="US"/>
    </style:style>
    <style:style style:family="paragraph" style:name="a1447">
      <style:paragraph-properties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8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paragraph" style:name="a607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9">
      <style:table-row-properties style:row-height="0.75413in"/>
    </style:style>
    <style:style style:family="presentation" style:name="a609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/>
    </style:style>
    <style:style style:family="table-cell" style:name="a1131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32">
      <style:text-properties fo:font-size="0.22222in" style:font-size-asian="0.22222in" style:font-size-complex="0.22222in" fo:language="en" fo:country="US"/>
    </style:style>
    <style:style style:family="paragraph" style:name="a1133">
      <style:paragraph-properties/>
    </style:style>
    <style:style style:family="table-cell" style:name="a1134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35">
      <style:text-properties fo:font-size="0.22222in" style:font-size-asian="0.22222in" style:font-size-complex="0.22222in" fo:language="en" fo:country="US"/>
    </style:style>
    <style:style style:family="table-cell" style:name="a17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36">
      <style:paragraph-properties/>
    </style:style>
    <style:style style:family="text" style:name="a1761">
      <style:text-properties fo:language="en" fo:country="US"/>
    </style:style>
    <style:style style:family="table-cell" style:name="a1137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paragraph" style:name="a1762">
      <style:paragraph-properties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size="0.22222in" style:font-size-asian="0.22222in" style:font-size-complex="0.22222in" fo:language="en" fo:country="US"/>
    </style:style>
    <style:style style:family="table-cell" style:name="a17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/>
    </style:style>
    <style:style style:family="table-row" style:name="a1764">
      <style:table-row-properties style:row-height="1.10765in"/>
    </style:style>
    <style:style style:family="drawing-page" style:name="a92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3" style:parent-style-name="Graphics">
      <style:graphic-properties draw:fill="none" draw:stroke="none"/>
    </style:style>
    <style:style style:family="text" style:name="a1765">
      <style:text-properties fo:language="en" fo:country="US"/>
    </style:style>
    <style:style style:family="drawing-page" style:name="a92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6">
      <style:paragraph-properties/>
    </style:style>
    <style:style style:family="graphic" style:name="a925" style:parent-style-name="Graphics">
      <style:graphic-properties draw:fill="none" draw:stroke="none"/>
    </style:style>
    <style:style style:family="table-cell" style:name="a17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language="en" fo:country="US"/>
    </style:style>
    <style:style style:family="graphic" style:name="a927" style:parent-style-name="Graphics">
      <style:graphic-properties draw:fill="none" draw:stroke="none"/>
    </style:style>
    <style:style style:family="paragraph" style:name="a1769">
      <style:paragraph-properties/>
    </style:style>
    <style:style style:family="drawing-page" style:name="a92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 style:parent-style-name="Graphics">
      <style:graphic-properties draw:fill="none" draw:stroke="none"/>
    </style:style>
    <style:style style:family="text" style:name="a1450">
      <style:text-properties fo:font-size="0.22222in" style:font-size-asian="0.22222in" style:font-size-complex="0.22222in" fo:language="en" fo:country="US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610" style:parent-style-name="Graphics">
      <style:graphic-properties draw:fill="none" fo:clip="rect(0in, 0in, 0in, 0in)" draw:stroke="none" draw:image-opacity="100%"/>
    </style:style>
    <style:style style:family="text" style:name="a1452">
      <style:text-properties fo:font-size="0.22222in" style:font-size-asian="0.22222in" style:font-size-complex="0.22222in" fo:language="en" fo:country="US"/>
    </style:style>
    <style:style style:family="text" style:name="a611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size="0.22222in" style:font-size-asian="0.22222in" style:font-size-complex="0.22222in" fo:language="en" fo:country="US"/>
    </style:style>
    <style:style style:family="graphic" style:name="a613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5">
      <style:paragraph-properties fo:text-align="left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1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458">
      <style:paragraph-properties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1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0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41">
      <style:text-properties fo:font-size="0.22222in" style:font-size-asian="0.22222in" style:font-size-complex="0.22222in" fo:language="en" fo:country="US"/>
    </style:style>
    <style:style style:family="paragraph" style:name="a1142">
      <style:paragraph-properties/>
    </style:style>
    <style:style style:family="table-cell" style:name="a1143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44">
      <style:text-properties fo:font-size="0.22222in" style:font-size-asian="0.22222in" style:font-size-complex="0.22222in" fo:language="en" fo:country="US"/>
    </style:style>
    <style:style style:family="paragraph" style:name="a1145">
      <style:paragraph-properties/>
    </style:style>
    <style:style style:family="table-cell" style:name="a17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46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771">
      <style:text-properties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7">
      <style:text-properties fo:font-size="0.22222in" style:font-size-asian="0.22222in" style:font-size-complex="0.22222in" fo:language="en" fo:country="US"/>
    </style:style>
    <style:style style:family="text" style:name="a1772">
      <style:text-properties fo:language="en" fo:country="US"/>
    </style:style>
    <style:style style:family="drawing-page" style:name="a93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/>
    </style:style>
    <style:style style:family="paragraph" style:name="a1773">
      <style:paragraph-properties/>
    </style:style>
    <style:style style:family="graphic" style:name="a931" style:parent-style-name="Graphics">
      <style:graphic-properties draw:fill="none" draw:stroke="none"/>
    </style:style>
    <style:style style:family="table-cell" style:name="a1149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able-cell" style:name="a17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93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 style:parent-style-name="Graphics">
      <style:graphic-properties draw:fill="none" draw:stroke="none"/>
    </style:style>
    <style:style style:family="table-row" style:name="a1775">
      <style:table-row-properties style:row-height="1.02244in"/>
    </style:style>
    <style:style style:family="drawing-page" style:name="a93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language="en" fo:country="US"/>
    </style:style>
    <style:style style:family="graphic" style:name="a935" style:parent-style-name="Graphics">
      <style:graphic-properties draw:fill="none" draw:stroke="none"/>
    </style:style>
    <style:style style:family="paragraph" style:name="a1777">
      <style:paragraph-properties/>
    </style:style>
    <style:style style:family="drawing-page" style:name="a93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37" style:parent-style-name="Graphics">
      <style:graphic-properties draw:fill="none" draw:stroke="none"/>
    </style:style>
    <style:style style:family="text" style:name="a1779">
      <style:text-properties fo:language="en" fo:country="US"/>
    </style:style>
    <style:style style:family="drawing-page" style:name="a93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size="0.22222in" style:font-size-asian="0.22222in" style:font-size-complex="0.22222in" fo:language="en" fo:country="US"/>
    </style:style>
    <style:style style:family="paragraph" style:name="a1461">
      <style:paragraph-properties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3">
      <style:text-properties fo:font-size="0.22222in" style:font-size-asian="0.22222in" style:font-size-complex="0.22222in" fo:language="en" fo:country="US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/>
    </style:style>
    <style:style style:family="paragraph" style:name="a62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66">
      <style:text-properties fo:font-size="0.22222in" style:font-size-asian="0.22222in" style:font-size-complex="0.22222in" fo:language="en" fo:country="US"/>
    </style:style>
    <style:style style:family="graphic" style:name="a62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67">
      <style:paragraph-properties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27">
      <style:paragraph-properties fo:line-height="200%" fo:text-align="left" style:tab-stop-distance="1in" fo:margin-left="0.93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size="0.22222in" style:font-size-asian="0.22222in" style:font-size-complex="0.22222in" fo:language="en" fo:country="US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50">
      <style:table-row-properties style:row-height="0.97496in"/>
    </style:style>
    <style:style style:family="text" style:name="a1151">
      <style:text-properties fo:font-size="0.22222in" style:font-size-asian="0.22222in" style:font-size-complex="0.22222in" fo:language="en" fo:country="US"/>
    </style:style>
    <style:style style:family="text" style:name="a1152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53">
      <style:paragraph-properties fo:text-align="left"/>
    </style:style>
    <style:style style:family="table-cell" style:name="a115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55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780">
      <style:paragraph-properties/>
    </style:style>
    <style:style style:family="paragraph" style:name="a1156">
      <style:paragraph-properties/>
    </style:style>
    <style:style style:family="table-cell" style:name="a17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5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782">
      <style:text-properties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size="0.22222in" style:font-size-asian="0.22222in" style:font-size-complex="0.22222in" fo:language="en" fo:country="US"/>
    </style:style>
    <style:style style:family="paragraph" style:name="a1783">
      <style:paragraph-properties fo:line-height="100%" fo:text-align="left" fo:margin-top="0in" fo:margin-bottom="0in"/>
    </style:style>
    <style:style style:family="presentation" style:name="a941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9">
      <style:paragraph-properties/>
    </style:style>
    <style:style style:family="text" style:name="a1784">
      <style:text-properties fo:color="#000000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42" style:parent-style-name="Graphics">
      <style:graphic-properties draw:fill="none" fo:clip="rect(0in, 0in, 0in, 0in)" draw:stroke="non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1787">
      <style:table-row-properties style:row-height="1.10765in"/>
    </style:style>
    <style:style style:family="drawing-page" style:name="a94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8">
      <style:text-properties fo:language="en" fo:country="US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/>
    </style:style>
    <style:style style:family="table-cell" style:name="a147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30">
      <style:paragraph-properties fo:line-height="200%" fo:text-align="left" style:tab-stop-distance="1in" fo:margin-left="0.93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size="0.22222in" style:font-size-asian="0.22222in" style:font-size-complex="0.22222in" fo:language="en" fo:country="US"/>
    </style:style>
    <style:style style:family="paragraph" style:name="a1473">
      <style:paragraph-properties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33">
      <style:paragraph-properties fo:line-height="200%" fo:text-align="left" style:tab-stop-distance="1in" fo:margin-left="0.93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size="0.22222in" style:font-size-asian="0.22222in" style:font-size-complex="0.22222in" fo:language="en" fo:country="US"/>
    </style:style>
    <style:style style:family="paragraph" style:name="a1476">
      <style:paragraph-properties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36">
      <style:paragraph-properties fo:line-height="200%" fo:text-align="left" style:tab-stop-distance="1in" fo:margin-left="0.93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size="0.22222in" style:font-size-asian="0.22222in" style:font-size-complex="0.22222in" fo:language="en" fo:country="US"/>
    </style:style>
    <style:style style:family="paragraph" style:name="a1479">
      <style:paragraph-properties/>
    </style:style>
    <style:style style:family="graphic" style:name="a63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6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61">
      <style:text-properties fo:font-size="0.22222in" style:font-size-asian="0.22222in" style:font-size-complex="0.22222in" fo:language="en" fo:country="US"/>
    </style:style>
    <style:style style:family="paragraph" style:name="a1162">
      <style:paragraph-properties/>
    </style:style>
    <style:style style:family="table-cell" style:name="a1163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64">
      <style:text-properties fo:font-size="0.22222in" style:font-size-asian="0.22222in" style:font-size-complex="0.22222in" fo:language="en" fo:country="US"/>
    </style:style>
    <style:style style:family="paragraph" style:name="a1165">
      <style:paragraph-properties/>
    </style:style>
    <style:style style:family="table-cell" style:name="a17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66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791">
      <style:text-properties fo:language="en" fo:country="US"/>
    </style:style>
    <style:style style:family="text" style:name="a1167">
      <style:text-properties fo:font-size="0.22222in" style:font-size-asian="0.22222in" style:font-size-complex="0.22222in" fo:language="en" fo:country="US"/>
    </style:style>
    <style:style style:family="paragraph" style:name="a1792">
      <style:paragraph-properties/>
    </style:style>
    <style:style style:family="text" style:name="a950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/>
    </style:style>
    <style:style style:family="table-cell" style:name="a17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794">
      <style:text-properties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52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53">
      <style:table-properties style:writing-mode="lr-tb"/>
    </style:style>
    <style:style style:family="paragraph" style:name="a1795">
      <style:paragraph-properties fo:line-height="100%" fo:text-align="left" fo:margin-top="0in" fo:margin-bottom="0in"/>
    </style:style>
    <style:style style:family="table-column" style:name="a954">
      <style:table-column-properties style:column-width="1.99896in"/>
    </style:style>
    <style:style style:family="text" style:name="a1796">
      <style:text-properties fo:color="#000000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55">
      <style:table-column-properties style:column-width="1.20029in"/>
    </style:style>
    <style:style style:family="paragraph" style:name="a1797">
      <style:paragraph-properties/>
    </style:style>
    <style:style style:family="table-column" style:name="a956">
      <style:table-column-properties style:column-width="1.12027in"/>
    </style:style>
    <style:style style:family="table-cell" style:name="a17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957">
      <style:table-column-properties style:column-width="0.97279in"/>
    </style:style>
    <style:style style:family="table-row" style:name="a1799">
      <style:table-row-properties style:row-height="0.78103in"/>
    </style:style>
    <style:style style:family="table-column" style:name="a958">
      <style:table-column-properties style:column-width="1.0669in"/>
    </style:style>
    <style:style style:family="table-column" style:name="a959">
      <style:table-column-properties style:column-width="1.15755in"/>
    </style:style>
    <style:style style:family="table-cell" style:name="a148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81">
      <style:text-properties fo:font-size="0.22222in" style:font-size-asian="0.22222in" style:font-size-complex="0.22222in" fo:language="en" fo:country="US"/>
    </style:style>
    <style:style style:family="presentation" style:name="a64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482">
      <style:paragraph-properties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1483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drawing-page" style:name="a64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484">
      <style:table-row-properties style:row-height="0.64662in"/>
    </style:style>
    <style:style style:family="graphic" style:name="a643" style:parent-style-name="Graphics">
      <style:graphic-properties draw:fill="none" draw:stroke="none"/>
    </style:style>
    <style:style style:family="text" style:name="a1485">
      <style:text-properties fo:font-size="0.22222in" style:font-size-asian="0.22222in" style:font-size-complex="0.22222in" fo:language="en" fo:country="US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text-align="left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resentation" style:name="a646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647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/>
    </style:style>
    <style:style style:family="paragraph" style:name="a6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size="0.22222in" style:font-size-asian="0.22222in" style:font-size-complex="0.22222in" fo:language="en" fo:country="US"/>
    </style:style>
    <style:style style:family="paragraph" style:name="a1171">
      <style:paragraph-properties/>
    </style:style>
    <style:style style:family="table-cell" style:name="a117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73">
      <style:text-properties fo:font-size="0.22222in" style:font-size-asian="0.22222in" style:font-size-complex="0.22222in" fo:language="en" fo:country="US"/>
    </style:style>
    <style:style style:family="paragraph" style:name="a1174">
      <style:paragraph-properties/>
    </style:style>
    <style:style style:family="table-cell" style:name="a117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76">
      <style:text-properties fo:font-size="0.22222in" style:font-size-asian="0.22222in" style:font-size-complex="0.22222in" fo:language="en" fo:country="US"/>
    </style:style>
    <style:style style:family="paragraph" style:name="a1177">
      <style:paragraph-properties/>
    </style:style>
    <style:style style:family="table-column" style:name="a960">
      <style:table-column-properties style:column-width="1.24547in"/>
    </style:style>
    <style:style style:family="table-cell" style:name="a117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column" style:name="a961">
      <style:table-column-properties style:column-width="1.1722in"/>
    </style:style>
    <style:style style:family="text" style:name="a1179">
      <style:text-properties fo:font-size="0.22222in" style:font-size-asian="0.22222in" style:font-size-complex="0.22222in" fo:language="en" fo:country="US"/>
    </style:style>
    <style:style style:family="table-column" style:name="a962">
      <style:table-column-properties style:column-width="1.18089in"/>
    </style:style>
    <style:style style:family="table-column" style:name="a963">
      <style:table-column-properties style:column-width="1.23468in"/>
    </style:style>
    <style:style style:family="table-row" style:name="a964">
      <style:table-row-properties style:row-height="0.4999in"/>
    </style:style>
    <style:style style:family="text" style:name="a965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66">
      <style:paragraph-properties fo:text-align="center"/>
    </style:style>
    <style:style style:family="table-cell" style:name="a967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68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69">
      <style:paragraph-properties fo:text-align="center"/>
    </style:style>
    <style:style style:family="table-cell" style:name="a149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491">
      <style:text-properties fo:font-size="0.22222in" style:font-size-asian="0.22222in" style:font-size-complex="0.22222in" fo:language="en" fo:country="US"/>
    </style:style>
    <style:style style:family="graphic" style:name="a650" style:parent-style-name="Graphics">
      <style:graphic-properties draw:fill="none" fo:clip="rect(0in, 0in, 0in, 0in)" draw:stroke="none" draw:image-opacity="100%"/>
    </style:style>
    <style:style style:family="paragraph" style:name="a1492">
      <style:paragraph-properties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65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size="0.22222in" style:font-size-asian="0.22222in" style:font-size-complex="0.22222in" fo:language="en" fo:country="US"/>
    </style:style>
    <style:style style:family="paragraph" style:name="a1495">
      <style:paragraph-properties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6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7">
      <style:text-properties fo:font-size="0.22222in" style:font-size-asian="0.22222in" style:font-size-complex="0.22222in" fo:language="en" fo:country="US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/>
    </style:style>
    <style:style style:family="paragraph" style:name="a657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9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0">
      <style:paragraph-properties/>
    </style:style>
    <style:style style:family="table-cell" style:name="a118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row" style:name="a1182">
      <style:table-row-properties style:row-height="0.73743in"/>
    </style:style>
    <style:style style:family="text" style:name="a1183">
      <style:text-properties fo:font-size="0.22222in" style:font-size-asian="0.22222in" style:font-size-complex="0.22222in" fo:language="en" fo:country="US"/>
    </style:style>
    <style:style style:family="text" style:name="a1184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85">
      <style:paragraph-properties fo:text-align="left"/>
    </style:style>
    <style:style style:family="table-cell" style:name="a118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87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970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paragraph" style:name="a1188">
      <style:paragraph-properties/>
    </style:style>
    <style:style style:family="text" style:name="a971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118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972">
      <style:paragraph-properties fo:text-align="center"/>
    </style:style>
    <style:style style:family="table-cell" style:name="a973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74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75">
      <style:paragraph-properties fo:text-align="center"/>
    </style:style>
    <style:style style:family="table-cell" style:name="a976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77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78">
      <style:paragraph-properties fo:text-align="center"/>
    </style:style>
    <style:style style:family="table-cell" style:name="a979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size="0.22222in" style:font-size-asian="0.22222in" style:font-size-complex="0.22222in" fo:language="en" fo:country="US"/>
    </style:style>
    <style:style style:family="paragraph" style:name="a1191">
      <style:paragraph-properties/>
    </style:style>
    <style:style style:family="table-cell" style:name="a119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193">
      <style:text-properties fo:font-size="0.22222in" style:font-size-asian="0.22222in" style:font-size-complex="0.22222in" fo:language="en" fo:country="US"/>
    </style:style>
    <style:style style:family="paragraph" style:name="a1194">
      <style:paragraph-properties/>
    </style:style>
    <style:style style:family="table-cell" style:name="a1195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196">
      <style:text-properties fo:font-size="0.22222in" style:font-size-asian="0.22222in" style:font-size-complex="0.22222in" fo:language="en" fo:country="US"/>
    </style:style>
    <style:style style:family="paragraph" style:name="a1197">
      <style:paragraph-properties/>
    </style:style>
    <style:style style:family="text" style:name="a980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1198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paragraph" style:name="a981">
      <style:paragraph-properties fo:text-align="center"/>
    </style:style>
    <style:style style:family="text" style:name="a1199">
      <style:text-properties fo:font-size="0.22222in" style:font-size-asian="0.22222in" style:font-size-complex="0.22222in" fo:language="en" fo:country="US"/>
    </style:style>
    <style:style style:family="table-cell" style:name="a982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83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84">
      <style:paragraph-properties fo:text-align="center"/>
    </style:style>
    <style:style style:family="table-cell" style:name="a985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86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87">
      <style:paragraph-properties fo:text-align="center"/>
    </style:style>
    <style:style style:family="table-cell" style:name="a988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89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90">
      <style:paragraph-properties fo:text-align="center"/>
    </style:style>
    <style:style style:family="table-cell" style:name="a991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992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93">
      <style:paragraph-properties fo:text-align="center"/>
    </style:style>
    <style:style style:family="table-cell" style:name="a994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able-row" style:name="a995">
      <style:table-row-properties style:row-height="1.06155in"/>
    </style:style>
    <style:style style:family="text" style:name="a996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97">
      <style:paragraph-properties fo:text-align="left"/>
    </style:style>
    <style:style style:family="table-cell" style:name="a99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999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6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9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text-align="left"/>
    </style:style>
    <style:style style:family="table-cell" style:name="a1601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able-row" style:name="a1602">
      <style:table-row-properties style:row-height="0.38742in"/>
    </style:style>
    <style:style style:family="text" style:name="a1603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1604">
      <style:text-properties fo:font-size="0.15278in" style:font-size-asian="0.15278in" style:font-size-complex="0.15278in" fo:language="en" fo:country="US"/>
    </style:style>
    <style:style style:family="paragraph" style:name="a1605">
      <style:paragraph-properties fo:text-align="left"/>
    </style:style>
    <style:style style:family="table-cell" style:name="a160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07">
      <style:text-properties fo:font-size="0.15278in" style:font-size-asian="0.15278in" style:font-size-complex="0.15278in" fo:language="en" fo:country="US"/>
    </style:style>
    <style:style style:family="paragraph" style:name="a1608">
      <style:paragraph-properties fo:text-align="left"/>
    </style:style>
    <style:style style:family="table-cell" style:name="a160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10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611">
      <style:paragraph-properties fo:text-align="left"/>
    </style:style>
    <style:style style:family="table-cell" style:name="a1612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13">
      <style:text-properties fo:font-size="0.15278in" style:font-size-asian="0.15278in" style:font-size-complex="0.15278in" fo:language="en" fo:country="US"/>
    </style:style>
    <style:style style:family="text" style:name="a1614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615">
      <style:paragraph-properties fo:text-align="left"/>
    </style:style>
    <style:style style:family="table-cell" style:name="a161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able-row" style:name="a1617">
      <style:table-row-properties style:row-height="0.26135in"/>
    </style:style>
    <style:style style:family="text" style:name="a1618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1619">
      <style:text-properties fo:font-size="0.15278in" style:font-size-asian="0.15278in" style:font-size-complex="0.15278in" fo:language="en" fo:country="US"/>
    </style:style>
    <style:style style:family="table-cell" style:name="a130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01">
      <style:text-properties fo:font-size="0.22222in" style:font-size-asian="0.22222in" style:font-size-complex="0.22222in" fo:language="en" fo:country="US"/>
    </style:style>
    <style:style style:family="paragraph" style:name="a1302">
      <style:paragraph-properties fo:text-align="center"/>
    </style:style>
    <style:style style:family="table-cell" style:name="a130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04">
      <style:text-properties fo:font-size="0.22222in" style:font-size-asian="0.22222in" style:font-size-complex="0.22222in" fo:language="en" fo:country="US"/>
    </style:style>
    <style:style style:family="paragraph" style:name="a1305">
      <style:paragraph-properties fo:text-align="center"/>
    </style:style>
    <style:style style:family="table-cell" style:name="a130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07">
      <style:text-properties fo:font-size="0.22222in" style:font-size-asian="0.22222in" style:font-size-complex="0.22222in" fo:language="en" fo:country="US"/>
    </style:style>
    <style:style style:family="paragraph" style:name="a1308">
      <style:paragraph-properties fo:text-align="center"/>
    </style:style>
    <style:style style:family="table-cell" style:name="a130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1620">
      <style:paragraph-properties fo:text-align="left"/>
    </style:style>
    <style:style style:family="table-cell" style:name="a1621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22">
      <style:text-properties fo:font-size="0.15278in" style:font-size-asian="0.15278in" style:font-size-complex="0.15278in" fo:language="en" fo:country="US"/>
    </style:style>
    <style:style style:family="paragraph" style:name="a1623">
      <style:paragraph-properties fo:text-align="left"/>
    </style:style>
    <style:style style:family="table-cell" style:name="a1624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25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626">
      <style:paragraph-properties fo:text-align="left"/>
    </style:style>
    <style:style style:family="table-cell" style:name="a1627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28">
      <style:text-properties fo:font-size="0.15278in" style:font-size-asian="0.15278in" style:font-size-complex="0.15278in" fo:language="en" fo:country="US"/>
    </style:style>
    <style:style style:family="paragraph" style:name="a1629">
      <style:paragraph-properties fo:text-align="left"/>
    </style:style>
    <style:style style:family="text" style:name="a1310">
      <style:text-properties fo:font-size="0.22222in" style:font-size-asian="0.22222in" style:font-size-complex="0.22222in" fo:language="en" fo:country="US"/>
    </style:style>
    <style:style style:family="paragraph" style:name="a1311">
      <style:paragraph-properties fo:text-align="center"/>
    </style:style>
    <style:style style:family="table-cell" style:name="a1312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313">
      <style:text-properties fo:font-size="0.22222in" style:font-size-asian="0.22222in" style:font-size-complex="0.22222in" fo:language="en" fo:country="US"/>
    </style:style>
    <style:style style:family="paragraph" style:name="a1314">
      <style:paragraph-properties fo:text-align="center"/>
    </style:style>
    <style:style style:family="table-cell" style:name="a1315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316">
      <style:text-properties fo:font-size="0.22222in" style:font-size-asian="0.22222in" style:font-size-complex="0.22222in" fo:language="en" fo:country="US"/>
    </style:style>
    <style:style style:family="paragraph" style:name="a1317">
      <style:paragraph-properties fo:text-align="center"/>
    </style:style>
    <style:style style:family="table-cell" style:name="a131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19">
      <style:text-properties fo:font-size="0.22222in" style:font-size-asian="0.22222in" style:font-size-complex="0.22222in" fo:language="en" fo:country="US"/>
    </style:style>
    <style:style style:family="paragraph" style:name="a1000">
      <style:paragraph-properties/>
    </style:style>
    <style:style style:family="table-cell" style:name="a100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02">
      <style:text-properties fo:font-size="0.22222in" style:font-size-asian="0.22222in" style:font-size-complex="0.22222in" fo:language="en" fo:country="US"/>
    </style:style>
    <style:style style:family="paragraph" style:name="a1003">
      <style:paragraph-properties/>
    </style:style>
    <style:style style:family="table-cell" style:name="a1004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005">
      <style:text-properties fo:font-size="0.22222in" style:font-size-asian="0.22222in" style:font-size-complex="0.22222in" fo:language="en" fo:country="US"/>
    </style:style>
    <style:style style:family="table-cell" style:name="a163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1006">
      <style:paragraph-properties/>
    </style:style>
    <style:style style:family="table-row" style:name="a1631">
      <style:table-row-properties style:row-height="0.38742in"/>
    </style:style>
    <style:style style:family="table-cell" style:name="a100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632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1008">
      <style:text-properties fo:font-size="0.22222in" style:font-size-asian="0.22222in" style:font-size-complex="0.22222in" fo:language="en" fo:country="US"/>
    </style:style>
    <style:style style:family="text" style:name="a1633">
      <style:text-properties fo:font-size="0.14583in" style:font-size-asian="0.14583in" style:font-size-complex="0.14583in" fo:language="en" fo:country="US" fo:font-weight="bold" style:font-weight-asian="bold" style:font-weight-complex="bold"/>
    </style:style>
    <style:style style:family="paragraph" style:name="a1009">
      <style:paragraph-properties/>
    </style:style>
    <style:style style:family="paragraph" style:name="a1634">
      <style:paragraph-properties fo:text-align="left"/>
    </style:style>
    <style:style style:family="table-cell" style:name="a1635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36">
      <style:text-properties fo:font-size="0.15278in" style:font-size-asian="0.15278in" style:font-size-complex="0.15278in" fo:language="en" fo:country="US"/>
    </style:style>
    <style:style style:family="paragraph" style:name="a1637">
      <style:paragraph-properties fo:text-align="left"/>
    </style:style>
    <style:style style:family="table-cell" style:name="a1638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639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320">
      <style:paragraph-properties fo:text-align="center"/>
    </style:style>
    <style:style style:family="table-cell" style:name="a132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22">
      <style:text-properties fo:font-size="0.22222in" style:font-size-asian="0.22222in" style:font-size-complex="0.22222in" fo:language="en" fo:country="US"/>
    </style:style>
    <style:style style:family="paragraph" style:name="a1323">
      <style:paragraph-properties fo:text-align="center"/>
    </style:style>
    <style:style style:family="table-cell" style:name="a132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row" style:name="a1325">
      <style:table-row-properties style:row-height="0.99705in"/>
    </style:style>
    <style:style style:family="text" style:name="a1326">
      <style:text-properties fo:font-size="0.22222in" style:font-size-asian="0.22222in" style:font-size-complex="0.22222in" fo:language="en" fo:country="US"/>
    </style:style>
    <style:style style:family="paragraph" style:name="a1327">
      <style:paragraph-properties fo:text-align="left"/>
    </style:style>
    <style:style style:family="table-cell" style:name="a132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29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101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11">
      <style:text-properties fo:font-size="0.22222in" style:font-size-asian="0.22222in" style:font-size-complex="0.22222in" fo:language="en" fo:country="US"/>
    </style:style>
    <style:style style:family="paragraph" style:name="a1012">
      <style:paragraph-properties/>
    </style:style>
    <style:style style:family="table-cell" style:name="a101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14">
      <style:text-properties fo:font-size="0.22222in" style:font-size-asian="0.22222in" style:font-size-complex="0.22222in" fo:language="en" fo:country="US"/>
    </style:style>
    <style:style style:family="paragraph" style:name="a1015">
      <style:paragraph-properties/>
    </style:style>
    <style:style style:family="paragraph" style:name="a1640">
      <style:paragraph-properties fo:text-align="left"/>
    </style:style>
    <style:style style:family="table-cell" style:name="a101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cell" style:name="a1641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017">
      <style:text-properties fo:font-size="0.22222in" style:font-size-asian="0.22222in" style:font-size-complex="0.22222in" fo:language="en" fo:country="US"/>
    </style:style>
    <style:style style:family="text" style:name="a1642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018">
      <style:paragraph-properties/>
    </style:style>
    <style:style style:family="paragraph" style:name="a1643">
      <style:paragraph-properties fo:text-align="left"/>
    </style:style>
    <style:style style:family="graphic" style:name="a801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cell" style:name="a1644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resentation" style:name="a8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none" draw:stroke="solid" svg:stroke-width="0.01389in" svg:stroke-color="#000000" svg:stroke-opacity="100%" draw:stroke-linejoin="round" svg:stroke-linecap="butt"/>
    </style:style>
    <style:style style:family="table-row" style:name="a1645">
      <style:table-row-properties style:row-height="0.55058in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drawing-page" style:name="a80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size="0.14583in" style:font-size-asian="0.14583in" style:font-size-complex="0.14583in" fo:language="en" fo:country="US" fo:font-weight="bold" style:font-weight-asian="bold" style:font-weight-complex="bold"/>
    </style:style>
    <style:style style:family="graphic" style:name="a806" style:parent-style-name="Graphics">
      <style:graphic-properties draw:fill="none" draw:stroke="none"/>
    </style:style>
    <style:style style:family="paragraph" style:name="a1648">
      <style:paragraph-properties fo:text-align="lef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0">
      <style:paragraph-properties/>
    </style:style>
    <style:style style:family="table-cell" style:name="a133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32">
      <style:text-properties fo:font-size="0.22222in" style:font-size-asian="0.22222in" style:font-size-complex="0.22222in" fo:language="en" fo:country="US"/>
    </style:style>
    <style:style style:family="paragraph" style:name="a1333">
      <style:paragraph-properties/>
    </style:style>
    <style:style style:family="table-cell" style:name="a133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35">
      <style:text-properties fo:font-size="0.22222in" style:font-size-asian="0.22222in" style:font-size-complex="0.22222in" fo:language="en" fo:country="US"/>
    </style:style>
    <style:style style:family="paragraph" style:name="a1336">
      <style:paragraph-properties/>
    </style:style>
    <style:style style:family="table-cell" style:name="a133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38">
      <style:text-properties fo:font-size="0.22222in" style:font-size-asian="0.22222in" style:font-size-complex="0.22222in" fo:language="en" fo:country="US"/>
    </style:style>
    <style:style style:family="paragraph" style:name="a1339">
      <style:paragraph-properties/>
    </style:style>
    <style:style style:family="text" style:name="a1020">
      <style:text-properties fo:font-size="0.22222in" style:font-size-asian="0.22222in" style:font-size-complex="0.22222in" fo:language="en" fo:country="US"/>
    </style:style>
    <style:style style:family="paragraph" style:name="a1021">
      <style:paragraph-properties/>
    </style:style>
    <style:style style:family="table-cell" style:name="a102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23">
      <style:text-properties fo:font-size="0.22222in" style:font-size-asian="0.22222in" style:font-size-complex="0.22222in" fo:language="en" fo:country="US"/>
    </style:style>
    <style:style style:family="paragraph" style:name="a1024">
      <style:paragraph-properties/>
    </style:style>
    <style:style style:family="table-cell" style:name="a102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650">
      <style:text-properties fo:font-size="0.15278in" style:font-size-asian="0.15278in" style:font-size-complex="0.15278in" fo:language="en" fo:country="US"/>
    </style:style>
    <style:style style:family="table-row" style:name="a1026">
      <style:table-row-properties style:row-height="0.80292in"/>
    </style:style>
    <style:style style:family="text" style:name="a1651">
      <style:text-properties fo:font-size="0.14583in" style:font-size-asian="0.14583in" style:font-size-complex="0.14583in" fo:language="en" fo:country="US"/>
    </style:style>
    <style:style style:family="text" style:name="a1027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652">
      <style:paragraph-properties fo:text-align="lef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text-align="left"/>
    </style:style>
    <style:style style:family="table-cell" style:name="a1653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2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654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text-align="left"/>
    </style:style>
    <style:style style:family="table-cell" style:name="a165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8">
      <style:paragraph-properties fo:text-align="lef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818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41">
      <style:text-properties fo:font-size="0.22222in" style:font-size-asian="0.22222in" style:font-size-complex="0.22222in" fo:language="en" fo:country="US"/>
    </style:style>
    <style:style style:family="paragraph" style:name="a1342">
      <style:paragraph-properties/>
    </style:style>
    <style:style style:family="table-cell" style:name="a134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44">
      <style:text-properties fo:font-size="0.22222in" style:font-size-asian="0.22222in" style:font-size-complex="0.22222in" fo:language="en" fo:country="US"/>
    </style:style>
    <style:style style:family="paragraph" style:name="a1345">
      <style:paragraph-properties/>
    </style:style>
    <style:style style:family="table-cell" style:name="a1346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347">
      <style:text-properties fo:font-size="0.22222in" style:font-size-asian="0.22222in" style:font-size-complex="0.22222in" fo:language="en" fo:country="US"/>
    </style:style>
    <style:style style:family="paragraph" style:name="a1348">
      <style:paragraph-properties/>
    </style:style>
    <style:style style:family="table-cell" style:name="a1349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030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031">
      <style:paragraph-properties/>
    </style:style>
    <style:style style:family="table-cell" style:name="a103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33">
      <style:text-properties fo:font-size="0.22222in" style:font-size-asian="0.22222in" style:font-size-complex="0.22222in" fo:language="en" fo:country="US"/>
    </style:style>
    <style:style style:family="paragraph" style:name="a1034">
      <style:paragraph-properties/>
    </style:style>
    <style:style style:family="table-cell" style:name="a1035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able-row" style:name="a1660">
      <style:table-row-properties style:row-height="0.4515in"/>
    </style:style>
    <style:style style:family="text" style:name="a1036">
      <style:text-properties fo:font-size="0.22222in" style:font-size-asian="0.22222in" style:font-size-complex="0.22222in" fo:language="en" fo:country="US"/>
    </style:style>
    <style:style style:family="text" style:name="a1661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aragraph" style:name="a1037">
      <style:paragraph-properties/>
    </style:style>
    <style:style style:family="text" style:name="a1662">
      <style:text-properties fo:font-size="0.15278in" style:font-size-asian="0.15278in" style:font-size-complex="0.15278in" fo:language="en" fo:country="US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8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paragraph" style:name="a1663">
      <style:paragraph-properties fo:text-align="lef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9">
      <style:text-properties fo:font-size="0.22222in" style:font-size-asian="0.22222in" style:font-size-complex="0.22222in" fo:language="en" fo:country="US"/>
    </style:style>
    <style:style style:family="table-cell" style:name="a1664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size="0.15278in" style:font-size-asian="0.15278in" style:font-size-complex="0.15278in" fo:language="en" fo:country="US"/>
    </style:style>
    <style:style style:family="paragraph" style:name="a1666">
      <style:paragraph-properties fo:text-align="lef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67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8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text-align="left"/>
    </style:style>
    <style:style style:family="paragraph" style:name="a828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size="0.22222in" style:font-size-asian="0.22222in" style:font-size-complex="0.22222in" fo:language="en" fo:country="US"/>
    </style:style>
    <style:style style:family="paragraph" style:name="a1351">
      <style:paragraph-properties/>
    </style:style>
    <style:style style:family="table-cell" style:name="a1352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353">
      <style:text-properties fo:font-size="0.22222in" style:font-size-asian="0.22222in" style:font-size-complex="0.22222in" fo:language="en" fo:country="US"/>
    </style:style>
    <style:style style:family="paragraph" style:name="a1354">
      <style:paragraph-properties/>
    </style:style>
    <style:style style:family="table-cell" style:name="a135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row" style:name="a1356">
      <style:table-row-properties style:row-height="0.64662in"/>
    </style:style>
    <style:style style:family="text" style:name="a1357">
      <style:text-properties fo:font-size="0.22222in" style:font-size-asian="0.22222in" style:font-size-complex="0.22222in" fo:language="en" fo:country="US"/>
    </style:style>
    <style:style style:family="paragraph" style:name="a1358">
      <style:paragraph-properties fo:text-align="left"/>
    </style:style>
    <style:style style:family="table-cell" style:name="a135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1040">
      <style:paragraph-properties/>
    </style:style>
    <style:style style:family="table-cell" style:name="a104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42">
      <style:text-properties fo:font-size="0.22222in" style:font-size-asian="0.22222in" style:font-size-complex="0.22222in" fo:language="en" fo:country="US"/>
    </style:style>
    <style:style style:family="paragraph" style:name="a1043">
      <style:paragraph-properties/>
    </style:style>
    <style:style style:family="table-cell" style:name="a104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45">
      <style:text-properties fo:font-size="0.22222in" style:font-size-asian="0.22222in" style:font-size-complex="0.22222in" fo:language="en" fo:country="US"/>
    </style:style>
    <style:style style:family="table-cell" style:name="a167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1046">
      <style:paragraph-properties/>
    </style:style>
    <style:style style:family="text" style:name="a1671">
      <style:text-properties fo:font-size="0.15278in" style:font-size-asian="0.15278in" style:font-size-complex="0.15278in" fo:language="en" fo:country="US"/>
    </style:style>
    <style:style style:family="table-cell" style:name="a104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1672">
      <style:paragraph-properties fo:text-align="lef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size="0.22222in" style:font-size-asian="0.22222in" style:font-size-complex="0.22222in" fo:language="en" fo:country="US"/>
    </style:style>
    <style:style style:family="table-cell" style:name="a1673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9">
      <style:paragraph-properties/>
    </style:style>
    <style:style style:family="table-row" style:name="a1674">
      <style:table-row-properties style:row-height="0.38742in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aragraph" style:name="a834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size="0.14583in" style:font-size-asian="0.14583in" style:font-size-complex="0.14583in" fo:language="en" fo:country="US" fo:font-weight="bold" style:font-weight-asian="bold" style:font-weight-complex="bold"/>
    </style:style>
    <style:style style:family="paragraph" style:name="a1677">
      <style:paragraph-properties fo:text-align="left"/>
    </style:style>
    <style:style style:family="presentation" style:name="a836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78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37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size="0.15278in" style:font-size-asian="0.15278in" style:font-size-complex="0.15278in" fo:language="en" fo:country="US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361">
      <style:paragraph-properties/>
    </style:style>
    <style:style style:family="table-cell" style:name="a136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63">
      <style:text-properties fo:font-size="0.22222in" style:font-size-asian="0.22222in" style:font-size-complex="0.22222in" fo:language="en" fo:country="US"/>
    </style:style>
    <style:style style:family="paragraph" style:name="a1364">
      <style:paragraph-properties/>
    </style:style>
    <style:style style:family="table-cell" style:name="a136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66">
      <style:text-properties fo:font-size="0.22222in" style:font-size-asian="0.22222in" style:font-size-complex="0.22222in" fo:language="en" fo:country="US"/>
    </style:style>
    <style:style style:family="paragraph" style:name="a1367">
      <style:paragraph-properties/>
    </style:style>
    <style:style style:family="table-cell" style:name="a136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69">
      <style:text-properties fo:font-size="0.22222in" style:font-size-asian="0.22222in" style:font-size-complex="0.22222in" fo:language="en" fo:country="US"/>
    </style:style>
    <style:style style:family="table-cell" style:name="a105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51">
      <style:text-properties fo:font-size="0.22222in" style:font-size-asian="0.22222in" style:font-size-complex="0.22222in" fo:language="en" fo:country="US"/>
    </style:style>
    <style:style style:family="paragraph" style:name="a1052">
      <style:paragraph-properties/>
    </style:style>
    <style:style style:family="table-cell" style:name="a105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54">
      <style:text-properties fo:font-size="0.22222in" style:font-size-asian="0.22222in" style:font-size-complex="0.22222in" fo:language="en" fo:country="US"/>
    </style:style>
    <style:style style:family="paragraph" style:name="a1055">
      <style:paragraph-properties/>
    </style:style>
    <style:style style:family="text" style:name="a1680">
      <style:text-properties fo:font-size="0.14583in" style:font-size-asian="0.14583in" style:font-size-complex="0.14583in" fo:language="en" fo:country="US"/>
    </style:style>
    <style:style style:family="table-cell" style:name="a105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1681">
      <style:paragraph-properties fo:text-align="left"/>
    </style:style>
    <style:style style:family="table-row" style:name="a1057">
      <style:table-row-properties style:row-height="0.5443in"/>
    </style:style>
    <style:style style:family="table-cell" style:name="a1682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resentation" style:name="a8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683">
      <style:text-properties fo:font-size="0.14583in" style:font-size-asian="0.14583in" style:font-size-complex="0.14583in" fo:language="en" fo:country="US"/>
    </style:style>
    <style:style style:family="presentation" style:name="a84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059">
      <style:paragraph-properties fo:text-align="left"/>
    </style:style>
    <style:style style:family="text" style:name="a1684">
      <style:text-properties fo:font-size="0.14583in" style:font-size-asian="0.14583in" style:font-size-complex="0.14583in" fo:language="en" fo:country="US" fo:font-weight="normal" style:font-weight-asian="normal" style:font-weight-complex="normal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5">
      <style:paragraph-properties fo:text-align="lef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size="0.15278in" style:font-size-asian="0.15278in" style:font-size-complex="0.15278in" fo:language="en" fo:country="US"/>
    </style:style>
    <style:style style:family="presentation" style:name="a846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size="0.14583in" style:font-size-asian="0.14583in" style:font-size-complex="0.14583in" fo:language="en" fo:country="US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text-align="lef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/>
    </style:style>
    <style:style style:family="table-cell" style:name="a137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72">
      <style:text-properties fo:font-size="0.22222in" style:font-size-asian="0.22222in" style:font-size-complex="0.22222in" fo:language="en" fo:country="US"/>
    </style:style>
    <style:style style:family="paragraph" style:name="a1373">
      <style:paragraph-properties/>
    </style:style>
    <style:style style:family="table-cell" style:name="a137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75">
      <style:text-properties fo:font-size="0.22222in" style:font-size-asian="0.22222in" style:font-size-complex="0.22222in" fo:language="en" fo:country="US"/>
    </style:style>
    <style:style style:family="paragraph" style:name="a1376">
      <style:paragraph-properties/>
    </style:style>
    <style:style style:family="table-cell" style:name="a137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78">
      <style:text-properties fo:font-size="0.22222in" style:font-size-asian="0.22222in" style:font-size-complex="0.22222in" fo:language="en" fo:country="US"/>
    </style:style>
    <style:style style:family="paragraph" style:name="a1379">
      <style:paragraph-properties/>
    </style:style>
    <style:style style:family="table-cell" style:name="a106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61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062">
      <style:paragraph-properties/>
    </style:style>
    <style:style style:family="table-cell" style:name="a106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64">
      <style:text-properties fo:font-size="0.22222in" style:font-size-asian="0.22222in" style:font-size-complex="0.22222in" fo:language="en" fo:country="US"/>
    </style:style>
    <style:style style:family="paragraph" style:name="a1065">
      <style:paragraph-properties/>
    </style:style>
    <style:style style:family="table-cell" style:name="a169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able-cell" style:name="a1066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able-row" style:name="a1691">
      <style:table-row-properties style:row-height="0.38742in"/>
    </style:style>
    <style:style style:family="text" style:name="a1067">
      <style:text-properties fo:font-size="0.22222in" style:font-size-asian="0.22222in" style:font-size-complex="0.22222in" fo:language="en" fo:country="US"/>
    </style:style>
    <style:style style:family="text" style:name="a1692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aragraph" style:name="a85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/>
    </style:style>
    <style:style style:family="paragraph" style:name="a1693">
      <style:paragraph-properties fo:text-align="left"/>
    </style:style>
    <style:style style:family="table-cell" style:name="a1069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able-cell" style:name="a16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size="0.15278in" style:font-size-asian="0.15278in" style:font-size-complex="0.15278in" fo:language="en" fo:country="US"/>
    </style:style>
    <style:style style:family="paragraph" style:name="a85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text-align="left"/>
    </style:style>
    <style:style style:family="table-cell" style:name="a1697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8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8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857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text-align="left"/>
    </style:style>
    <style:style style:family="text" style:name="a8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380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381">
      <style:text-properties fo:font-size="0.22222in" style:font-size-asian="0.22222in" style:font-size-complex="0.22222in" fo:language="en" fo:country="US"/>
    </style:style>
    <style:style style:family="paragraph" style:name="a1382">
      <style:paragraph-properties/>
    </style:style>
    <style:style style:family="table-cell" style:name="a1383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drawing-page" style:name="a542">
      <style:drawing-page-properties draw:fill="solid" draw:fill-color="#343437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4">
      <style:text-properties fo:font-size="0.22222in" style:font-size-asian="0.22222in" style:font-size-complex="0.22222in" fo:language="en" fo:country="US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/>
    </style:style>
    <style:style style:family="text" style:name="a5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87">
      <style:table-row-properties style:row-height="0.64662in"/>
    </style:style>
    <style:style style:family="presentation" style:name="a546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size="0.22222in" style:font-size-asian="0.22222in" style:font-size-complex="0.22222in" fo:language="en" fo:country="US"/>
    </style:style>
    <style:style style:family="text" style:name="a547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9">
      <style:paragraph-properties fo:text-align="left"/>
    </style:style>
    <style:style style:family="paragraph" style:name="a548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size="0.22222in" style:font-size-asian="0.22222in" style:font-size-complex="0.22222in" fo:language="en" fo:country="US"/>
    </style:style>
    <style:style style:family="paragraph" style:name="a1071">
      <style:paragraph-properties/>
    </style:style>
    <style:style style:family="table-cell" style:name="a107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73">
      <style:text-properties fo:font-size="0.22222in" style:font-size-asian="0.22222in" style:font-size-complex="0.22222in" fo:language="en" fo:country="US"/>
    </style:style>
    <style:style style:family="paragraph" style:name="a1074">
      <style:paragraph-properties/>
    </style:style>
    <style:style style:family="table-cell" style:name="a107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76">
      <style:text-properties fo:font-size="0.22222in" style:font-size-asian="0.22222in" style:font-size-complex="0.22222in" fo:language="en" fo:country="US"/>
    </style:style>
    <style:style style:family="paragraph" style:name="a1077">
      <style:paragraph-properties/>
    </style:style>
    <style:style style:family="paragraph" style:name="a86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8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79">
      <style:text-properties fo:font-size="0.22222in" style:font-size-asian="0.22222in" style:font-size-complex="0.22222in" fo:language="en" fo:country="US"/>
    </style:style>
    <style:style style:family="text" style:name="a8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391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550">
      <style:paragraph-properties fo:line-height="7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/>
    </style:style>
    <style:style style:family="text" style:name="a551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552">
      <style:paragraph-properties fo:line-height="7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size="0.22222in" style:font-size-asian="0.22222in" style:font-size-complex="0.22222in" fo:language="en" fo:country="US"/>
    </style:style>
    <style:style style:family="text" style:name="a553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/>
    </style:style>
    <style:style style:family="paragraph" style:name="a554">
      <style:paragraph-properties fo:line-height="7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resentation" style:name="a555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size="0.22222in" style:font-size-asian="0.22222in" style:font-size-complex="0.22222in" fo:language="en" fo:country="US"/>
    </style:style>
    <style:style style:family="text" style:name="a556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0569in" style:font-size-asian="0.30569in" style:font-size-complex="0.30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8">
      <style:paragraph-properties/>
    </style:style>
    <style:style style:family="text" style:name="a557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39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0569in" style:font-size-asian="0.30569in" style:font-size-complex="0.30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/>
    </style:style>
    <style:style style:family="table-cell" style:name="a108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82">
      <style:text-properties fo:font-size="0.22222in" style:font-size-asian="0.22222in" style:font-size-complex="0.22222in" fo:language="en" fo:country="US"/>
    </style:style>
    <style:style style:family="paragraph" style:name="a1083">
      <style:paragraph-properties/>
    </style:style>
    <style:style style:family="table-cell" style:name="a108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85">
      <style:text-properties fo:font-size="0.22222in" style:font-size-asian="0.22222in" style:font-size-complex="0.22222in" fo:language="en" fo:country="US"/>
    </style:style>
    <style:style style:family="paragraph" style:name="a1086">
      <style:paragraph-properties/>
    </style:style>
    <style:style style:family="table-cell" style:name="a108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graphic" style:name="a870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88">
      <style:table-row-properties style:row-height="0.5443in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b4b4b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fo:clip="rect(0in, 0in, 0in, 0in)" draw:stroke="none" draw:image-opacity="100%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paragraph" style:name="a1090">
      <style:paragraph-properties fo:text-align="left"/>
    </style:style>
    <style:style style:family="table-cell" style:name="a109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92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093">
      <style:paragraph-properties/>
    </style:style>
    <style:style style:family="table-cell" style:name="a109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095">
      <style:text-properties fo:font-size="0.22222in" style:font-size-asian="0.22222in" style:font-size-complex="0.22222in" fo:language="en" fo:country="US"/>
    </style:style>
    <style:style style:family="paragraph" style:name="a1096">
      <style:paragraph-properties/>
    </style:style>
    <style:style style:family="table-cell" style:name="a1097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098">
      <style:text-properties fo:font-size="0.22222in" style:font-size-asian="0.22222in" style:font-size-complex="0.22222in" fo:language="en" fo:country="US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presentation" style:name="a5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 style:parent-style-name="Graphics">
      <style:graphic-properties draw:fill="none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0">
      <style:paragraph-properties fo:line-height="1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2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1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language="en" fo:country="US"/>
    </style:style>
    <style:style style:family="paragraph" style:name="a1801">
      <style:paragraph-properties/>
    </style:style>
    <style:style style:family="table-cell" style:name="a18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3">
      <style:text-properties fo:language="en" fo:country="US"/>
    </style:style>
    <style:style style:family="paragraph" style:name="a1804">
      <style:paragraph-properties/>
    </style:style>
    <style:style style:family="table-cell" style:name="a18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6">
      <style:text-properties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7">
      <style:paragraph-properties fo:line-height="100%" fo:text-align="left" fo:margin-top="0in" fo:margin-bottom="0in"/>
    </style:style>
    <style:style style:family="text" style:name="a1808">
      <style:text-properties fo:language="en" fo:country="US"/>
    </style:style>
    <style:style style:family="paragraph" style:name="a1809">
      <style:paragraph-properties/>
    </style:style>
    <style:style style:family="table-cell" style:name="a18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9" style:parent-style-name="Graphics">
      <style:graphic-properties draw:fill="none" fo:clip="rect(0in, 0in, 0in, 0in)" draw:stroke="none"/>
    </style:style>
    <style:style style:family="text" style:name="a1500">
      <style:text-properties fo:font-size="0.22222in" style:font-size-asian="0.22222in" style:font-size-complex="0.22222in" fo:language="en" fo:country="US"/>
    </style:style>
    <style:style style:family="paragraph" style:name="a1501">
      <style:paragraph-properties/>
    </style:style>
    <style:style style:family="table-cell" style:name="a1502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503">
      <style:text-properties fo:font-size="0.22222in" style:font-size-asian="0.22222in" style:font-size-complex="0.22222in" fo:language="en" fo:country="US"/>
    </style:style>
    <style:style style:family="paragraph" style:name="a1504">
      <style:paragraph-properties/>
    </style:style>
    <style:style style:family="table-cell" style:name="a1505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506">
      <style:text-properties fo:font-size="0.22222in" style:font-size-asian="0.22222in" style:font-size-complex="0.22222in" fo:language="en" fo:country="US"/>
    </style:style>
    <style:style style:family="paragraph" style:name="a1507">
      <style:paragraph-properties/>
    </style:style>
    <style:style style:family="table-cell" style:name="a1508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509">
      <style:text-properties fo:font-size="0.22222in" style:font-size-asian="0.22222in" style:font-size-complex="0.22222in" fo:language="en" fo:country="US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4" style:parent-style-name="Graphics">
      <style:graphic-properties draw:fill="none" draw:stroke="none"/>
    </style:style>
    <style:style style:family="drawing-page" style:name="a182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6" style:parent-style-name="Graphics">
      <style:graphic-properties draw:fill="none" draw:stroke="none"/>
    </style:style>
    <style:style style:family="drawing-page" style:name="a182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8" style:parent-style-name="Graphics">
      <style:graphic-properties draw:fill="none" draw:stroke="none"/>
    </style:style>
    <style:style style:family="drawing-page" style:name="a182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/>
    </style:style>
    <style:style style:family="table-cell" style:name="a1511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512">
      <style:text-properties fo:font-size="0.22222in" style:font-size-asian="0.22222in" style:font-size-complex="0.22222in" fo:language="en" fo:country="US"/>
    </style:style>
    <style:style style:family="paragraph" style:name="a1513">
      <style:paragraph-properties/>
    </style:style>
    <style:style style:family="table-cell" style:name="a1514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200">
      <style:paragraph-properties/>
    </style:style>
    <style:style style:family="table-cell" style:name="a1201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02">
      <style:text-properties fo:font-size="0.22222in" style:font-size-asian="0.22222in" style:font-size-complex="0.22222in" fo:language="en" fo:country="US"/>
    </style:style>
    <style:style style:family="paragraph" style:name="a1203">
      <style:paragraph-properties/>
    </style:style>
    <style:style style:family="table-cell" style:name="a120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05">
      <style:text-properties fo:font-size="0.22222in" style:font-size-asian="0.22222in" style:font-size-complex="0.22222in" fo:language="en" fo:country="US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/>
    </style:style>
    <style:style style:family="paragraph" style:name="a1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resentation" style:name="a1832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size="0.22222in" style:font-size-asian="0.22222in" style:font-size-complex="0.22222in" fo:language="en" fo:country="US"/>
    </style:style>
    <style:style style:family="text" style:name="a1833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/>
    </style:style>
    <style:style style:family="paragraph" style:name="a1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2" style:parent-style-name="Graphics">
      <style:graphic-properties draw:fill="none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11">
      <style:text-properties fo:font-size="0.22222in" style:font-size-asian="0.22222in" style:font-size-complex="0.22222in" fo:language="en" fo:country="US"/>
    </style:style>
    <style:style style:family="paragraph" style:name="a1212">
      <style:paragraph-properties/>
    </style:style>
    <style:style style:family="table-cell" style:name="a121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presentation" style:name="a12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41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532">
      <style:table-properties style:writing-mode="lr-tb"/>
    </style:style>
    <style:style style:family="table-column" style:name="a1533">
      <style:table-column-properties style:column-width="2.54026in"/>
    </style:style>
    <style:style style:family="table-column" style:name="a1534">
      <style:table-column-properties style:column-width="4.99298in"/>
    </style:style>
    <style:style style:family="table-column" style:name="a1535">
      <style:table-column-properties style:column-width="1.6278in"/>
    </style:style>
    <style:style style:family="table-column" style:name="a1536">
      <style:table-column-properties style:column-width="1.86533in"/>
    </style:style>
    <style:style style:family="table-row" style:name="a1537">
      <style:table-row-properties style:row-height="0.26135in"/>
    </style:style>
    <style:style style:family="text" style:name="a1538">
      <style:text-properties fo:font-size="0.15278in" style:font-size-asian="0.15278in" style:font-size-complex="0.15278in" fo:language="en" fo:country="US"/>
    </style:style>
    <style:style style:family="paragraph" style:name="a1539">
      <style:paragraph-properties/>
    </style:style>
    <style:style style:family="graphic" style:name="a1220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21">
      <style:table-properties style:writing-mode="lr-tb"/>
    </style:style>
    <style:style style:family="table-column" style:name="a1222">
      <style:table-column-properties style:column-width="2.15381in"/>
    </style:style>
    <style:style style:family="table-column" style:name="a1223">
      <style:table-column-properties style:column-width="1.23531in"/>
    </style:style>
    <style:style style:family="table-column" style:name="a1224">
      <style:table-column-properties style:column-width="1.01648in"/>
    </style:style>
    <style:style style:family="table-column" style:name="a1225">
      <style:table-column-properties style:column-width="0.96598in"/>
    </style:style>
    <style:style style:family="paragraph" style:name="a1850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6">
      <style:table-column-properties style:column-width="1.1825in"/>
    </style:style>
    <style:style style:family="table-column" style:name="a1227">
      <style:table-column-properties style:column-width="1.24912in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8">
      <style:table-column-properties style:column-width="1.09922in"/>
    </style:style>
    <style:style style:family="paragraph" style:name="a1853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9">
      <style:table-column-properties style:column-width="1.26577in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541">
      <style:text-properties fo:font-size="0.15278in" style:font-size-asian="0.15278in" style:font-size-complex="0.15278in" fo:language="en" fo:country="US"/>
    </style:style>
    <style:style style:family="paragraph" style:name="a1542">
      <style:paragraph-properties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3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702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size="0.15278in" style:font-size-asian="0.15278in" style:font-size-complex="0.15278in" fo:language="en" fo:country="US"/>
    </style:style>
    <style:style style:family="paragraph" style:name="a1545">
      <style:paragraph-properties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6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705">
      <style:paragraph-properties fo:line-height="200%" fo:text-align="left" style:tab-stop-distance="0.9999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size="0.15278in" style:font-size-asian="0.15278in" style:font-size-complex="0.15278in" fo:language="en" fo:country="US"/>
    </style:style>
    <style:style style:family="paragraph" style:name="a1548">
      <style:paragraph-properties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4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graphic" style:name="a708" style:parent-style-name="Graphics">
      <style:graphic-properties draw:fill="none" draw:stroke="none"/>
    </style:style>
    <style:style style:family="graphic" style:name="a709" style:parent-style-name="Graphics">
      <style:graphic-properties draw:fill="none" draw:stroke="none"/>
    </style:style>
    <style:style style:family="table-column" style:name="a1230">
      <style:table-column-properties style:column-width="0.99051in"/>
    </style:style>
    <style:style style:family="table-column" style:name="a1231">
      <style:table-column-properties style:column-width="1.19129in"/>
    </style:style>
    <style:style style:family="table-row" style:name="a1232">
      <style:table-row-properties style:row-height="0.31002in"/>
    </style:style>
    <style:style style:family="text" style:name="a1233">
      <style:text-properties fo:font-size="0.22222in" style:font-size-asian="0.22222in" style:font-size-complex="0.22222in" fo:language="en" fo:country="US"/>
    </style:style>
    <style:style style:family="paragraph" style:name="a1234">
      <style:paragraph-properties fo:text-align="center"/>
    </style:style>
    <style:style style:family="table-cell" style:name="a1235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36">
      <style:text-properties fo:font-size="0.22222in" style:font-size-asian="0.22222in" style:font-size-complex="0.22222in" fo:language="en" fo:country="US"/>
    </style:style>
    <style:style style:family="presentation" style:name="a1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7">
      <style:paragraph-properties fo:text-align="center"/>
    </style:style>
    <style:style style:family="presentation" style:name="a18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38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presentation" style:name="a186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39">
      <style:text-properties fo:font-size="0.22222in" style:font-size-asian="0.22222in" style:font-size-complex="0.22222in" fo:language="en" fo:country="US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6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50">
      <style:table-row-properties style:row-height="0.71375in"/>
    </style:style>
    <style:style style:family="text" style:name="a1551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resentation" style:name="a7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size="0.15278in" style:font-size-asian="0.15278in" style:font-size-complex="0.15278in" fo:language="en" fo:country="US"/>
    </style:style>
    <style:style style:family="presentation" style:name="a71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553">
      <style:paragraph-properties fo:text-align="left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1554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drawing-page" style:name="a71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size="0.15278in" style:font-size-asian="0.15278in" style:font-size-complex="0.15278in" fo:language="en" fo:country="US"/>
    </style:style>
    <style:style style:family="graphic" style:name="a714" style:parent-style-name="Graphics">
      <style:graphic-properties draw:fill="none" fo:clip="rect(-0.0196in, 0.1725in, 1.17361in, 0in)" draw:stroke="none"/>
    </style:style>
    <style:style style:family="paragraph" style:name="a1556">
      <style:paragraph-properties fo:text-align="lef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7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resentation" style:name="a717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9">
      <style:paragraph-properties fo:text-align="lef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text-align="center"/>
    </style:style>
    <style:style style:family="table-cell" style:name="a1241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42">
      <style:text-properties fo:font-size="0.22222in" style:font-size-asian="0.22222in" style:font-size-complex="0.22222in" fo:language="en" fo:country="US"/>
    </style:style>
    <style:style style:family="paragraph" style:name="a1243">
      <style:paragraph-properties fo:text-align="center"/>
    </style:style>
    <style:style style:family="table-cell" style:name="a1244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45">
      <style:text-properties fo:font-size="0.22222in" style:font-size-asian="0.22222in" style:font-size-complex="0.22222in" fo:language="en" fo:country="US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text-align="center"/>
    </style:style>
    <style:style style:family="paragraph" style:name="a1871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7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48">
      <style:text-properties fo:font-size="0.22222in" style:font-size-asian="0.22222in" style:font-size-complex="0.22222in" fo:language="en" fo:country="US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text-align="center"/>
    </style:style>
    <style:style style:family="paragraph" style:name="a1874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561">
      <style:text-properties fo:font-size="0.15278in" style:font-size-asian="0.15278in" style:font-size-complex="0.15278in" fo:language="en" fo:country="US"/>
    </style:style>
    <style:style style:family="paragraph" style:name="a720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text-align="left"/>
    </style:style>
    <style:style style:family="table-cell" style:name="a1563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1564">
      <style:table-row-properties style:row-height="1.02198in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aragraph" style:name="a724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size="0.15278in" style:font-size-asian="0.15278in" style:font-size-complex="0.15278in" fo:language="en" fo:country="US"/>
    </style:style>
    <style:style style:family="paragraph" style:name="a1567">
      <style:paragraph-properties fo:text-align="left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568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size="0.15278in" style:font-size-asian="0.15278in" style:font-size-complex="0.15278in" fo:language="en" fo:country="US"/>
    </style:style>
    <style:style style:family="paragraph" style:name="a728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51">
      <style:text-properties fo:font-size="0.22222in" style:font-size-asian="0.22222in" style:font-size-complex="0.22222in" fo:language="en" fo:country="US"/>
    </style:style>
    <style:style style:family="paragraph" style:name="a1252">
      <style:paragraph-properties fo:text-align="center"/>
    </style:style>
    <style:style style:family="table-cell" style:name="a1253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54">
      <style:text-properties fo:font-size="0.22222in" style:font-size-asian="0.22222in" style:font-size-complex="0.22222in" fo:language="en" fo:country="US"/>
    </style:style>
    <style:style style:family="paragraph" style:name="a1255">
      <style:paragraph-properties fo:text-align="center"/>
    </style:style>
    <style:style style:family="paragraph" style:name="a1880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6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257">
      <style:text-properties fo:font-size="0.22222in" style:font-size-asian="0.22222in" style:font-size-complex="0.22222in" fo:language="en" fo:country="US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text-align="center"/>
    </style:style>
    <style:style style:family="paragraph" style:name="a1883">
      <style:paragraph-properties fo:line-height="95%" fo:text-align="left" style:tab-stop-distance="1in" fo:margin-left="0.49931in" fo:margin-right="0in" fo:text-indent="-0.3493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9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71">
      <style:text-properties fo:font-size="0.15278in" style:font-size-asian="0.15278in" style:font-size-complex="0.15278in" fo:language="en" fo:country="US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31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size="0.15278in" style:font-size-asian="0.15278in" style:font-size-complex="0.15278in" fo:language="en" fo:country="US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5">
      <style:text-properties fo:font-size="0.15278in" style:font-size-asian="0.15278in" style:font-size-complex="0.15278in" fo:language="en" fo:country="US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35">
      <style:paragraph-properties fo:line-height="2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size="0.15278in" style:font-size-asian="0.15278in" style:font-size-complex="0.15278in" fo:language="en" fo:country="US"/>
    </style:style>
    <style:style style:family="paragraph" style:name="a1578">
      <style:paragraph-properties fo:text-align="lef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entury Schoolbook" style:font-family-complex="Century Schoolboo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9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paragraph" style:name="a73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size="0.22222in" style:font-size-asian="0.22222in" style:font-size-complex="0.22222in" fo:language="en" fo:country="US"/>
    </style:style>
    <style:style style:family="paragraph" style:name="a1261">
      <style:paragraph-properties fo:text-align="center"/>
    </style:style>
    <style:style style:family="table-cell" style:name="a1262">
      <style:table-cell-properties style:vertical-align="middle" fo:background-color="#7ddafb" fo:padding-top="0.01394in" fo:padding-bottom="0.01394in" fo:padding-left="0.02788in" fo:padding-right="0.02788in"/>
      <style:paragraph-properties style:writing-mode="lr-tb"/>
    </style:style>
    <style:style style:family="table-row" style:name="a1263">
      <style:table-row-properties style:row-height="0.43834in"/>
    </style:style>
    <style:style style:family="text" style:name="a1264">
      <style:text-properties fo:font-size="0.22222in" style:font-size-asian="0.22222in" style:font-size-complex="0.22222in" fo:language="en" fo:country="US"/>
    </style:style>
    <style:style style:family="paragraph" style:name="a1265">
      <style:paragraph-properties fo:text-align="left"/>
    </style:style>
    <style:style style:family="table-cell" style:name="a1266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67">
      <style:text-properties fo:font-size="0.22222in" style:font-size-asian="0.22222in" style:font-size-complex="0.22222in" fo:language="en" fo:country="US"/>
    </style:style>
    <style:style style:family="paragraph" style:name="a1268">
      <style:paragraph-properties fo:text-align="left"/>
    </style:style>
    <style:style style:family="table-cell" style:name="a1269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580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1581">
      <style:paragraph-properties fo:text-align="left"/>
    </style:style>
    <style:style style:family="presentation" style:name="a740">
      <style:graphic-properties fo:wrap-option="wrap" fo:padding-top="0.04998in" fo:padding-bottom="0.04998in" fo:padding-left="0.09999in" fo:padding-right="0.09999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2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741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size="0.15278in" style:font-size-asian="0.15278in" style:font-size-complex="0.15278in" fo:language="en" fo:country="US"/>
    </style:style>
    <style:style style:family="paragraph" style:name="a7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text-align="left"/>
    </style:style>
    <style:style style:family="graphic" style:name="a743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5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graphic" style:name="a744" style:parent-style-name="Graphics">
      <style:graphic-properties draw:fill="none" fo:clip="rect(0in, 0in, 0in, 0in)" draw:stroke="none" draw:image-opacity="100%"/>
    </style:style>
    <style:style style:family="table-row" style:name="a1586">
      <style:table-row-properties style:row-height="0.55058in"/>
    </style:style>
    <style:style style:family="text" style:name="a7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7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8">
      <style:text-properties fo:font-size="0.15278in" style:font-size-asian="0.15278in" style:font-size-complex="0.15278in" fo:language="en" fo:country="US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text-align="left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size="0.22222in" style:font-size-asian="0.22222in" style:font-size-complex="0.22222in" fo:language="en" fo:country="US"/>
    </style:style>
    <style:style style:family="paragraph" style:name="a1271">
      <style:paragraph-properties fo:text-align="center"/>
    </style:style>
    <style:style style:family="table-cell" style:name="a1272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73">
      <style:text-properties fo:font-size="0.22222in" style:font-size-asian="0.22222in" style:font-size-complex="0.22222in" fo:language="en" fo:country="US"/>
    </style:style>
    <style:style style:family="paragraph" style:name="a1274">
      <style:paragraph-properties fo:text-align="center"/>
    </style:style>
    <style:style style:family="table-cell" style:name="a1275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76">
      <style:text-properties fo:font-size="0.22222in" style:font-size-asian="0.22222in" style:font-size-complex="0.22222in" fo:language="en" fo:country="US"/>
    </style:style>
    <style:style style:family="paragraph" style:name="a1277">
      <style:paragraph-properties fo:text-align="center"/>
    </style:style>
    <style:style style:family="table-cell" style:name="a1278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279">
      <style:text-properties fo:font-size="0.22222in" style:font-size-asian="0.22222in" style:font-size-complex="0.22222in" fo:language="en" fo:country="US"/>
    </style:style>
    <style:style style:family="table-cell" style:name="a1590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1591">
      <style:text-properties fo:font-size="0.15278in" style:font-size-asian="0.15278in" style:font-size-complex="0.15278in" fo:language="en" fo:country="US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2">
      <style:paragraph-properties fo:text-align="lef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size="0.15278in" style:font-size-asian="0.15278in" style:font-size-complex="0.15278in" fo:language="en" fo:country="US"/>
    </style:style>
    <style:style style:family="paragraph" style:name="a75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text-align="left"/>
    </style:style>
    <style:style style:family="table-cell" style:name="a1595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75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text-align="left"/>
    </style:style>
    <style:style style:family="table-cell" style:name="a1598">
      <style:table-cell-properties style:vertical-align="middle" fo:padding-top="0.03432in" fo:padding-bottom="0.03432in" fo:padding-left="0.06864in" fo:padding-right="0.06864in"/>
      <style:paragraph-properties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size="0.15278in" style:font-size-asian="0.15278in" style:font-size-complex="0.15278in" fo:language="en" fo:country="US"/>
    </style:style>
    <style:style style:family="paragraph" style:name="a75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text-align="center"/>
    </style:style>
    <style:style style:family="table-cell" style:name="a1281">
      <style:table-cell-properties style:vertical-align="middle" fo:background-color="#fdd3bc" fo:padding-top="0.01394in" fo:padding-bottom="0.01394in" fo:padding-left="0.02788in" fo:padding-right="0.02788in"/>
      <style:paragraph-properties style:writing-mode="lr-tb"/>
    </style:style>
    <style:style style:family="text" style:name="a1282">
      <style:text-properties fo:font-size="0.22222in" style:font-size-asian="0.22222in" style:font-size-complex="0.22222in" fo:language="en" fo:country="US"/>
    </style:style>
    <style:style style:family="paragraph" style:name="a1283">
      <style:paragraph-properties fo:text-align="center"/>
    </style:style>
    <style:style style:family="table-cell" style:name="a1284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85">
      <style:text-properties fo:font-size="0.22222in" style:font-size-asian="0.22222in" style:font-size-complex="0.22222in" fo:language="en" fo:country="US"/>
    </style:style>
    <style:style style:family="paragraph" style:name="a1286">
      <style:paragraph-properties fo:text-align="center"/>
    </style:style>
    <style:style style:family="table-cell" style:name="a128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88">
      <style:text-properties fo:font-size="0.22222in" style:font-size-asian="0.22222in" style:font-size-complex="0.22222in" fo:language="en" fo:country="US"/>
    </style:style>
    <style:style style:family="paragraph" style:name="a1289">
      <style:paragraph-properties fo:text-align="center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4998in" fo:padding-bottom="0.04998in" fo:padding-left="0.09999in" fo:padding-right="0.09999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0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91">
      <style:text-properties fo:font-size="0.22222in" style:font-size-asian="0.22222in" style:font-size-complex="0.22222in" fo:language="en" fo:country="US"/>
    </style:style>
    <style:style style:family="paragraph" style:name="a1292">
      <style:paragraph-properties fo:text-align="center"/>
    </style:style>
    <style:style style:family="table-cell" style:name="a1293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able-row" style:name="a1294">
      <style:table-row-properties style:row-height="0.51122in"/>
    </style:style>
    <style:style style:family="text" style:name="a1295">
      <style:text-properties fo:font-size="0.22222in" style:font-size-asian="0.22222in" style:font-size-complex="0.22222in" fo:language="en" fo:country="US"/>
    </style:style>
    <style:style style:family="paragraph" style:name="a1296">
      <style:paragraph-properties fo:text-align="left"/>
    </style:style>
    <style:style style:family="table-cell" style:name="a1297">
      <style:table-cell-properties style:vertical-align="middle" fo:background-color="#ffffff" fo:padding-top="0.01394in" fo:padding-bottom="0.01394in" fo:padding-left="0.02788in" fo:padding-right="0.02788in"/>
      <style:paragraph-properties style:writing-mode="lr-tb"/>
    </style:style>
    <style:style style:family="text" style:name="a1298">
      <style:text-properties fo:font-size="0.22222in" style:font-size-asian="0.22222in" style:font-size-complex="0.22222in" fo:language="en" fo:country="US"/>
    </style:style>
    <style:style style:family="paragraph" style:name="a1299">
      <style:paragraph-properties fo:text-align="left"/>
    </style:style>
    <text:list-style style:name="a75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1881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1884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662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1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88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51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666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854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631">
      <text:list-level-style-bullet text:level="1" text:bullet-char="•">
        <style:list-level-properties text:space-before="0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857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634">
      <text:list-level-style-bullet text:level="1" text:bullet-char="•">
        <style:list-level-properties text:space-before="0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7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37">
      <text:list-level-style-bullet text:level="1" text:bullet-char="•">
        <style:list-level-properties text:space-before="0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602">
      <text:list-level-style-number text:level="1" style:num-format="" style:num-list-format-name="">
        <style:list-level-properties text:space-before="0.375in"/>
      </text:list-level-style-number>
      <text:list-level-style-number text:level="2" style:num-format="" style:num-list-format-name="">
        <style:list-level-properties text:space-before="0.625in"/>
      </text:list-level-style-number>
      <text:list-level-style-number text:level="3" style:num-format="" style:num-list-format-name="">
        <style:list-level-properties text:space-before="1.125in"/>
      </text:list-level-style-number>
      <text:list-level-style-number text:level="4" style:num-format="" style:num-list-format-name="">
        <style:list-level-properties text:space-before="1.625in"/>
      </text:list-level-style-number>
      <text:list-level-style-number text:level="5" style:num-format="" style:num-list-format-name="">
        <style:list-level-properties text:space-before="2.125in"/>
      </text:list-level-style-number>
      <text:list-level-style-number text:level="6" style:num-format="" style:num-list-format-name="">
        <style:list-level-properties text:space-before="2.625in"/>
      </text:list-level-style-number>
      <text:list-level-style-number text:level="7" style:num-format="" style:num-list-format-name="">
        <style:list-level-properties text:space-before="3.125in"/>
      </text:list-level-style-number>
      <text:list-level-style-number text:level="8" style:num-format="" style:num-list-format-name="">
        <style:list-level-properties text:space-before="3.625in"/>
      </text:list-level-style-number>
      <text:list-level-style-number text:level="9" style:num-format="" style:num-list-format-name="">
        <style:list-level-properties text:space-before="4.125in"/>
      </text:list-level-style-number>
    </text:list-style>
    <text:list-style style:name="a7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125in"/>
        <style:text-properties fo:color="#6f6f74" fo:font-family="Arial" fo:font-size="0.2in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0.2in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0.2in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0.2in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0.2in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0.2in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0.2in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0.2in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0.2in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608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891">
      <text:list-level-style-bullet text:level="1" text:bullet-char="•">
        <style:list-level-properties text:space-before="0in" text:min-label-width="0.3125in"/>
        <style:text-properties fo:color="#6f6f74" fo:font-family="Arial" fo:font-size="0.2in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fo:font-size="0.2in"/>
      </text:list-level-style-bullet>
      <text:list-level-style-bullet text:level="3" text:bullet-char="•">
        <style:list-level-properties text:space-before="1in" text:min-label-width="0.3125in"/>
        <style:text-properties fo:color="#6f6f74" fo:font-family="Arial" fo:font-size="0.2in"/>
      </text:list-level-style-bullet>
      <text:list-level-style-bullet text:level="4" text:bullet-char="•">
        <style:list-level-properties text:space-before="1.5in" text:min-label-width="0.3125in"/>
        <style:text-properties fo:color="#6f6f74" fo:font-family="Arial" fo:font-size="0.2in"/>
      </text:list-level-style-bullet>
      <text:list-level-style-bullet text:level="5" text:bullet-char="•">
        <style:list-level-properties text:space-before="2in" text:min-label-width="0.3125in"/>
        <style:text-properties fo:color="#6f6f74" fo:font-family="Arial" fo:font-size="0.2in"/>
      </text:list-level-style-bullet>
      <text:list-level-style-bullet text:level="6" text:bullet-char="•">
        <style:list-level-properties text:space-before="2.5in" text:min-label-width="0.3125in"/>
        <style:text-properties fo:color="#6f6f74" fo:font-family="Arial" fo:font-size="0.2in"/>
      </text:list-level-style-bullet>
      <text:list-level-style-bullet text:level="7" text:bullet-char="•">
        <style:list-level-properties text:space-before="3in" text:min-label-width="0.3125in"/>
        <style:text-properties fo:color="#6f6f74" fo:font-family="Arial" fo:font-size="0.2in"/>
      </text:list-level-style-bullet>
      <text:list-level-style-bullet text:level="8" text:bullet-char="•">
        <style:list-level-properties text:space-before="3.5in" text:min-label-width="0.3125in"/>
        <style:text-properties fo:color="#6f6f74" fo:font-family="Arial" fo:font-size="0.2in"/>
      </text:list-level-style-bullet>
      <text:list-level-style-bullet text:level="9" text:bullet-char="•">
        <style:list-level-properties text:space-before="4in" text:min-label-width="0.3125in"/>
        <style:text-properties fo:color="#6f6f74" fo:font-family="Arial" fo:font-size="0.2in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860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706">
      <text:list-level-style-bullet text:level="1" text:bullet-char="•">
        <style:list-level-properties text:space-before="0in"/>
        <style:text-properties fo:color="#6f6f74" fo:font-family="Arial" fo:font-size="100%"/>
      </text:list-level-style-bullet>
      <text:list-level-style-bullet text:level="2" text:bullet-char="•">
        <style:list-level-properties text:space-before="0.25in"/>
        <style:text-properties fo:color="#6f6f74" fo:font-family="Arial" fo:font-size="100%"/>
      </text:list-level-style-bullet>
      <text:list-level-style-bullet text:level="3" text:bullet-char="•">
        <style:list-level-properties text:space-before="0.75in"/>
        <style:text-properties fo:color="#6f6f74" fo:font-family="Arial" fo:font-size="100%"/>
      </text:list-level-style-bullet>
      <text:list-level-style-bullet text:level="4" text:bullet-char="•">
        <style:list-level-properties text:space-before="1.25in"/>
        <style:text-properties fo:color="#6f6f74" fo:font-family="Arial" fo:font-size="100%"/>
      </text:list-level-style-bullet>
      <text:list-level-style-bullet text:level="5" text:bullet-char="•">
        <style:list-level-properties text:space-before="1.75in"/>
        <style:text-properties fo:color="#6f6f74" fo:font-family="Arial" fo:font-size="100%"/>
      </text:list-level-style-bullet>
      <text:list-level-style-bullet text:level="6" text:bullet-char="•">
        <style:list-level-properties text:space-before="2.25in"/>
        <style:text-properties fo:color="#6f6f74" fo:font-family="Arial" fo:font-size="100%"/>
      </text:list-level-style-bullet>
      <text:list-level-style-bullet text:level="7" text:bullet-char="•">
        <style:list-level-properties text:space-before="2.75in"/>
        <style:text-properties fo:color="#6f6f74" fo:font-family="Arial" fo:font-size="100%"/>
      </text:list-level-style-bullet>
      <text:list-level-style-bullet text:level="8" text:bullet-char="•">
        <style:list-level-properties text:space-before="3.25in"/>
        <style:text-properties fo:color="#6f6f74" fo:font-family="Arial" fo:font-size="100%"/>
      </text:list-level-style-bullet>
      <text:list-level-style-bullet text:level="9" text:bullet-char="•">
        <style:list-level-properties text:space-before="3.75in"/>
        <style:text-properties fo:color="#6f6f74" fo:font-family="Arial" fo:font-size="100%"/>
      </text:list-level-style-bullet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869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581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835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587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1839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800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65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1.15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65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2.15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65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3.15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65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4.15in" text:min-label-width="0.35in"/>
        <style:text-properties fo:color="#6f6f74" fo:font-family="Arial" fo:font-size="0.2in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65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1.15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65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2.15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65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3.15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65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4.15in" text:min-label-width="0.35in"/>
        <style:text-properties fo:color="#6f6f74" fo:font-family="Arial" fo:font-size="0.2in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72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90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75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87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878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590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1842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658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1845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62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848">
      <text:list-level-style-number text:level="1" style:num-format="" style:num-list-format-name="">
        <style:list-level-properties text:space-before="0.15in" text:min-label-width="0.34931in"/>
      </text:list-level-style-number>
      <text:list-level-style-number text:level="2" style:num-format="" style:num-list-format-name="">
        <style:list-level-properties text:space-before="0.4in" text:min-label-width="0.34931in"/>
      </text:list-level-style-number>
      <text:list-level-style-number text:level="3" style:num-format="" style:num-list-format-name="">
        <style:list-level-properties text:space-before="0.9in" text:min-label-width="0.34931in"/>
      </text:list-level-style-number>
      <text:list-level-style-number text:level="4" style:num-format="" style:num-list-format-name="">
        <style:list-level-properties text:space-before="1.4in" text:min-label-width="0.34931in"/>
      </text:list-level-style-number>
      <text:list-level-style-number text:level="5" style:num-format="" style:num-list-format-name="">
        <style:list-level-properties text:space-before="1.9in" text:min-label-width="0.34931in"/>
      </text:list-level-style-number>
      <text:list-level-style-number text:level="6" style:num-format="" style:num-list-format-name="">
        <style:list-level-properties text:space-before="2.4in" text:min-label-width="0.34931in"/>
      </text:list-level-style-number>
      <text:list-level-style-number text:level="7" style:num-format="" style:num-list-format-name="">
        <style:list-level-properties text:space-before="2.9in" text:min-label-width="0.34931in"/>
      </text:list-level-style-number>
      <text:list-level-style-number text:level="8" style:num-format="" style:num-list-format-name="">
        <style:list-level-properties text:space-before="3.4in" text:min-label-width="0.34931in"/>
      </text:list-level-style-number>
      <text:list-level-style-number text:level="9" style:num-format="" style:num-list-format-name="">
        <style:list-level-properties text:space-before="3.9in" text:min-label-width="0.34931in"/>
      </text:list-level-style-number>
    </text:list-style>
    <text:list-style style:name="a7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.15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628">
      <text:list-level-style-bullet text:level="1" text:bullet-char="•">
        <style:list-level-properties text:space-before="0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color="#6f6f74" fo:font-family="Arial" fo:font-size="100%"/>
      </text:list-level-style-bullet>
      <text:list-level-style-bullet text:level="2" text:bullet-char="•">
        <style:list-level-properties text:space-before="0.25in" text:min-label-width="0.3125in"/>
        <style:text-properties fo:color="#6f6f74" fo:font-family="Arial" fo:font-size="100%"/>
      </text:list-level-style-bullet>
      <text:list-level-style-bullet text:level="3" text:bullet-char="•">
        <style:list-level-properties text:space-before="0.75in" text:min-label-width="0.3125in"/>
        <style:text-properties fo:color="#6f6f74" fo:font-family="Arial" fo:font-size="100%"/>
      </text:list-level-style-bullet>
      <text:list-level-style-bullet text:level="4" text:bullet-char="•">
        <style:list-level-properties text:space-before="1.25in" text:min-label-width="0.3125in"/>
        <style:text-properties fo:color="#6f6f74" fo:font-family="Arial" fo:font-size="100%"/>
      </text:list-level-style-bullet>
      <text:list-level-style-bullet text:level="5" text:bullet-char="•">
        <style:list-level-properties text:space-before="1.75in" text:min-label-width="0.3125in"/>
        <style:text-properties fo:color="#6f6f74" fo:font-family="Arial" fo:font-size="100%"/>
      </text:list-level-style-bullet>
      <text:list-level-style-bullet text:level="6" text:bullet-char="•">
        <style:list-level-properties text:space-before="2.25in" text:min-label-width="0.3125in"/>
        <style:text-properties fo:color="#6f6f74" fo:font-family="Arial" fo:font-size="100%"/>
      </text:list-level-style-bullet>
      <text:list-level-style-bullet text:level="7" text:bullet-char="•">
        <style:list-level-properties text:space-before="2.75in" text:min-label-width="0.3125in"/>
        <style:text-properties fo:color="#6f6f74" fo:font-family="Arial" fo:font-size="100%"/>
      </text:list-level-style-bullet>
      <text:list-level-style-bullet text:level="8" text:bullet-char="•">
        <style:list-level-properties text:space-before="3.25in" text:min-label-width="0.3125in"/>
        <style:text-properties fo:color="#6f6f74" fo:font-family="Arial" fo:font-size="100%"/>
      </text:list-level-style-bullet>
      <text:list-level-style-bullet text:level="9" text:bullet-char="•">
        <style:list-level-properties text:space-before="3.75in" text:min-label-width="0.3125in"/>
        <style:text-properties fo:color="#6f6f74" fo:font-family="Arial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42" draw:master-page-name="Master1-Layout1-title-TITLE" presentation:presentation-page-layout-name="Master1-PPL1" draw:id="Slide-256">
        <draw:frame draw:id="id72" presentation:style-name="a546" draw:name="Google Shape;106;p15" svg:x="2.35032in" svg:y="2.23461in" svg:width="3.10822in" svg:height="1.50904in" presentation:class="title" presentation:placeholder="false">
          <draw:text-box>
            <text:p text:style-name="a545" text:class-names="" text:cond-style-name=""><text:span text:style-name="a543" text:class-names="">SA</text:span><text:span text:style-name="a544" text:class-names="">GE</text:span></text:p>
          </draw:text-box>
          <svg:title/>
          <svg:desc/>
        </draw:frame>
        <draw:frame draw:id="id73" presentation:style-name="a555" draw:name="Google Shape;107;p15" svg:x="1.38in" svg:y="5.25in" svg:width="5.81388in" svg:height="1.85in" presentation:class="subtitle" presentation:placeholder="false">
          <draw:text-box>
            <text:p text:style-name="a548" text:class-names="" text:cond-style-name=""><text:span text:style-name="a547" text:class-names="">Group Members</text:span></text:p>
            <text:p text:style-name="a550" text:class-names="" text:cond-style-name=""><text:span text:style-name="a549" text:class-names="">Ashar Naveed (22P-9346)</text:span></text:p>
            <text:p text:style-name="a552" text:class-names="" text:cond-style-name=""><text:span text:style-name="a551" text:class-names="">Muhammad Abdullah (22P-9321)</text:span></text:p>
            <text:p text:style-name="a554" text:class-names="" text:cond-style-name=""><text:span text:style-name="a553" text:class-names="">Dilawar Khan (22P-9099)</text:span></text:p>
          </draw:text-box>
          <svg:title/>
          <svg:desc/>
        </draw:frame>
        <draw:frame draw:id="id74" draw:style-name="a562" draw:name="Google Shape;108;p15" svg:x="7.42785in" svg:y="5.25in" svg:width="5.32286in" svg:height="1.85in">
          <draw:text-box>
            <text:p text:style-name="a558" text:class-names="" text:cond-style-name=""><text:span text:style-name="a556" text:class-names="">Project Supervisor</text:span><text:span text:style-name="a557" text:class-names=""/></text:p>
            <text:p text:style-name="a561" text:class-names="" text:cond-style-name=""><text:span text:style-name="a559" text:class-names="">Mr. Shoaib Muhammad Khan</text:span><text:span text:style-name="a560" text:class-names=""><text:line-break/><text:line-break/></text:span></text:p>
          </draw:text-box>
          <svg:title/>
          <svg:desc/>
        </draw:frame>
        <draw:frame draw:id="id75" draw:style-name="a563" draw:name="Google Shape;109;p15" svg:x="0.74606in" svg:y="0.21542in" svg:width="1.61032in" svg:height="1.61032in" style:rel-width="scale" style:rel-height="scale">
          <draw:image xlink:href="media/image1.png" xlink:type="simple" xlink:show="embed" xlink:actuate="onLoad"/>
          <svg:title/>
          <svg:desc>National University of Computer and Emerging Sciences - Wikipedia</svg:desc>
        </draw:frame>
        <draw:frame draw:id="id76" draw:style-name="a568" draw:name="Google Shape;108;p15" svg:x="2.35033in" svg:y="3.60481in" svg:width="4.36407in" svg:height="0.67708in">
          <draw:text-box>
            <text:p text:style-name="a567" text:class-names="" text:cond-style-name=""><text:span text:style-name="a564" text:class-names="">Your</text:span><text:span text:style-name="a565" text:class-names=""><text:s text:c="1"/>Hiring Partner</text:span><text:span text:style-name="a566" text:class-names=""/></text:p>
          </draw:text-box>
          <svg:title/>
          <svg:desc/>
        </draw:frame>
        <draw:frame draw:id="id77" draw:style-name="a569" draw:name="Picture 11" svg:x="10.2852in" svg:y="0.01956in" svg:width="2.34375in" svg:height="4.4609in" style:rel-width="scale" style:rel-height="scale">
          <draw:image xlink:href="media/image2.png" xlink:type="simple" xlink:show="embed" xlink:actuate="onLoad"/>
          <svg:title/>
          <svg:desc>A light bulb with a blue light bulb

AI-generated content may be incorrect.</svg:desc>
        </draw:frame>
        <draw:frame draw:id="id78" draw:style-name="a570" draw:name="Picture 1" svg:x="1.1945in" svg:y="2.55135in" svg:width="1.23268in" svg:height="1.15964in" style:rel-width="scale" style:rel-height="scale">
          <draw:image xlink:href="media/image3.png" xlink:type="simple" xlink:show="embed" xlink:actuate="onLoad"/>
          <svg:title/>
          <svg:desc>A blue cube with black background

AI-generated content may be incorrect.</svg:desc>
        </draw:frame>
        <presentation:notes draw:style-name="a573">
          <draw:frame draw:id="id79" presentation:style-name="a571" draw:name="Google Shape;103;p1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" svg:x="0.75in" svg:y="1.25in" svg:width="6in" svg:height="3.375in" presentation:class="page" draw:id="id80" presentation:style-name="a572" draw:name="Google Shape;104;p1:notes">
            <svg:title/>
            <svg:desc/>
          </draw:page-thumbnail>
        </presentation:notes>
      </draw:page>
      <draw:page draw:name="Slide2" draw:style-name="a574" draw:master-page-name="Master2-Layout1-obj-OBJECT" presentation:presentation-page-layout-name="Master2-PPL1" draw:id="Slide-257">
        <draw:frame draw:id="id81" draw:style-name="a575" draw:name="Picture 18" svg:x="8.23333in" svg:y="2.48958in" svg:width="4.11667in" svg:height="5.01042in" style:rel-width="scale" style:rel-height="scale">
          <draw:image xlink:href="media/image4.png" xlink:type="simple" xlink:show="embed" xlink:actuate="onLoad"/>
          <svg:title/>
          <svg:desc>A group of people sitting at a table

AI-generated content may be incorrect.</svg:desc>
        </draw:frame>
        <draw:frame draw:id="id82" presentation:style-name="a578" draw:name="Google Shape;114;p16" svg:x="1.38in" svg:y="0.4in" svg:width="10.6in" svg:height="1.44965in" presentation:class="title" presentation:placeholder="false">
          <draw:text-box>
            <text:p text:style-name="a577" text:class-names="" text:cond-style-name=""><text:span text:style-name="a576" text:class-names="">Introduction</text:span></text:p>
          </draw:text-box>
          <svg:title/>
          <svg:desc/>
        </draw:frame>
        <draw:frame draw:id="id83" presentation:style-name="a609" draw:name="Google Shape;115;p16" svg:x="1.38in" svg:y="2in" svg:width="10.85958in" svg:height="4.75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Need &amp; Value of Auto-Match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4" text:class-names="">Auto-Match adds value</text:span><text:span text:style-name="a595" text:class-names=""><text:s text:c="1"/></text:span><text:span text:style-name="a596" text:class-names="">by</text:span><text:span text:style-name="a597" text:class-names="">:</text:span></text:p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  <draw:frame draw:id="id84" draw:style-name="a610" draw:name="Google Shape;116;p16" svg:x="10.34302in" svg:y="0.31451in" svg:width="1.61032in" svg:height="1.61032in" style:rel-width="scale" style:rel-height="scale">
          <draw:image xlink:href="media/image1.png" xlink:type="simple" xlink:show="embed" xlink:actuate="onLoad"/>
          <svg:title/>
          <svg:desc>National University of Computer and Emerging Sciences - Wikipedia</svg:desc>
        </draw:frame>
        <draw:frame draw:id="id85" draw:style-name="a613" draw:name="Google Shape;117;p16" svg:x="12.35in" svg:y="6.75001in" svg:width="1in" svg:height="0.6493in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  <draw:custom-shape svg:x="1.95572in" svg:y="2.62646in" svg:width="7.72611in" svg:height="1.63302in" draw:id="id86" draw:style-name="a625" draw:name="Rectangle 3">
          <svg:title/>
          <svg:desc/>
          <text:list text:style-name="a616">
            <text:list-item>
              <text:p text:style-name="a615" text:class-names="" text:cond-style-name=""><text:span text:style-name="a614" text:class-names="">Traditional hiring for academic staff is slow, biased, and time consuming.</text:span></text:p>
            </text:list-item>
          </text:list>
          <text:list text:style-name="a619">
            <text:list-item>
              <text:p text:style-name="a618" text:class-names="" text:cond-style-name=""><text:span text:style-name="a617" text:class-names="">Manual CV reviews and interviews often cause delays &amp; inconsistency.</text:span></text:p>
            </text:list-item>
          </text:list>
          <text:list text:style-name="a624">
            <text:list-item>
              <text:p text:style-name="a623" text:class-names="" text:cond-style-name=""><text:span text:style-name="a620" text:class-names="">Candidates often get<text:s text:c="1"/></text:span><text:span text:style-name="a621" text:class-names="">ghosted</text:span><text:span text:style-name="a622" text:class-names=""><text:s text:c="1"/>after applying (no feedback or updates)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8in" svg:y="5.12087in" svg:width="7.17214in" svg:height="2.17156in" draw:id="id87" draw:style-name="a638" draw:name="Rectangle 3">
          <svg:title/>
          <svg:desc/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Reducing HR workload.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Ensuring unbiased evaluation.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lecting the best matched candidates.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Provides candidates with clear feedback and status updates.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41">
          <draw:frame draw:id="id88" presentation:style-name="a639" draw:name="Google Shape;111;p2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2" svg:x="0.75in" svg:y="1.25in" svg:width="6in" svg:height="3.375in" presentation:class="page" draw:id="id89" presentation:style-name="a640" draw:name="Google Shape;112;p2:notes">
            <svg:title/>
            <svg:desc/>
          </draw:page-thumbnail>
        </presentation:notes>
      </draw:page>
      <draw:page draw:name="Slide3" draw:style-name="a642" draw:master-page-name="Master2-Layout1-obj-OBJECT" presentation:presentation-page-layout-name="Master2-PPL1" draw:id="Slide-258">
        <draw:frame draw:id="id90" draw:style-name="a643" draw:name="Picture 6" svg:x="9.11345in" svg:y="4.80853in" svg:width="3.23655in" svg:height="3.23655in" style:rel-width="scale" style:rel-height="scale">
          <draw:image xlink:href="media/image5.png" xlink:type="simple" xlink:show="embed" xlink:actuate="onLoad"/>
          <svg:title/>
          <svg:desc>A cartoon of a person holding a puzzle piece</svg:desc>
        </draw:frame>
        <draw:frame draw:id="id91" presentation:style-name="a646" draw:name="Google Shape;122;p17" svg:x="1.38in" svg:y="0.4in" svg:width="10.6in" svg:height="1.44965in" presentation:class="title" presentation:placeholder="false">
          <draw:text-box>
            <text:p text:style-name="a645" text:class-names="" text:cond-style-name=""><text:span text:style-name="a644" text:class-names="">Motivation</text:span></text:p>
          </draw:text-box>
          <svg:title/>
          <svg:desc/>
        </draw:frame>
        <draw:frame draw:id="id92" draw:style-name="a649" draw:name="Google Shape;124;p17" svg:x="12.35in" svg:y="6.75001in" svg:width="1in" svg:height="0.6493in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  <draw:frame draw:id="id93" draw:style-name="a650" draw:name="Google Shape;125;p17" svg:x="10.34302in" svg:y="0.31451in" svg:width="1.61032in" svg:height="1.61032in" style:rel-width="scale" style:rel-height="scale">
          <draw:image xlink:href="media/image1.png" xlink:type="simple" xlink:show="embed" xlink:actuate="onLoad"/>
          <svg:title/>
          <svg:desc>National University of Computer and Emerging Sciences - Wikipedia</svg:desc>
        </draw:frame>
        <draw:frame draw:id="id94" presentation:style-name="a679" draw:name="Text Placeholder 1" svg:x="1.93126in" svg:y="2.20285in" svg:width="10.33642in" svg:height="3.87077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4" text:class-names="">Faculty hiring will<text:s text:c="1"/></text:span><text:span text:style-name="a655" text:class-names="">remain slow and inefficient</text:span><text:span text:style-name="a656" text:class-names="">, causing delays in filling key positions.</text:span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HR teams will stay overloaded</text:span><text:span text:style-name="a660" text:class-names="">, spending time on paperwork instead of quality evaluation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Bias and favoritism risks</text:span><text:span text:style-name="a664" text:class-names=""><text:s text:c="1"/>remain high due to manual shortlisting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7" text:class-names="">Candidates will keep getting “ghosted”</text:span><text:span text:style-name="a668" text:class-names=""><text:s text:c="1"/>with no feedback or clarity about their application status.</text:span></text:p>
              </text:list-item>
            </text:list>
            <text:list text:style-name="a675">
              <text:list-item>
                <text:p text:style-name="a674" text:class-names="" text:cond-style-name=""><text:span text:style-name="a671" text:class-names="">FAST-NUCES may<text:s text:c="1"/></text:span><text:span text:style-name="a672" text:class-names="">fall behind in digital transformation</text:span><text:span text:style-name="a673" text:class-names="">, while competitors adopt AI-driven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5"/>recruitment.</text:span></text:p>
              </text:list-item>
            </text:list>
          </draw:text-box>
          <svg:title/>
          <svg:desc/>
        </draw:frame>
        <draw:frame draw:id="id95" draw:style-name="a686" draw:name="Text Placeholder 1" svg:x="1.38in" svg:y="2.01367in" svg:width="5.519in" svg:height="1.44733in">
          <draw:text-box>
            <text:p text:style-name="a682" text:class-names="" text:cond-style-name=""><text:span text:style-name="a680" text:class-names="">What if we do not build Auto-Match?</text:span><text:span text:style-name="a681" text:class-names=""/></text:p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  <presentation:notes draw:style-name="a689">
          <draw:frame draw:id="id96" presentation:style-name="a687" draw:name="Google Shape;119;p3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3" svg:x="0.75in" svg:y="1.25in" svg:width="6in" svg:height="3.375in" presentation:class="page" draw:id="id97" presentation:style-name="a688" draw:name="Google Shape;120;p3:notes">
            <svg:title/>
            <svg:desc/>
          </draw:page-thumbnail>
        </presentation:notes>
      </draw:page>
      <draw:page draw:name="Slide4" draw:style-name="a690" draw:master-page-name="Master2-Layout1-obj-OBJECT" presentation:presentation-page-layout-name="Master2-PPL1" draw:id="Slide-259">
        <draw:frame draw:id="id98" presentation:style-name="a693" draw:name="Google Shape;130;p18" svg:x="1.38in" svg:y="0.4in" svg:width="10.6in" svg:height="1.44965in" presentation:class="title" presentation:placeholder="false">
          <draw:text-box>
            <text:p text:style-name="a692" text:class-names="" text:cond-style-name=""><text:span text:style-name="a691" text:class-names="">Problem Statement</text:span></text:p>
          </draw:text-box>
          <svg:title/>
          <svg:desc/>
        </draw:frame>
        <draw:frame draw:id="id99" draw:style-name="a696" draw:name="Google Shape;132;p18" svg:x="12.35in" svg:y="6.75001in" svg:width="1in" svg:height="0.6493in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  <draw:frame draw:id="id100" presentation:style-name="a707" draw:name="Text Placeholder 1" svg:x="1.38in" svg:y="2.18486in" svg:width="9.92188in" svg:height="3.1302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7" text:class-names="">Universities struggle with slow, biased, and unorganized hiring processes due to the absence of a smart, integrated system for evaluating, shortlisting, and matching candidates with suitable academic positions</text:span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  <draw:frame draw:id="id101" draw:style-name="a708" draw:name="Picture 14" svg:x="8.90027in" svg:y="-0.886in" svg:width="3.66452in" svg:height="3.66452in" style:rel-width="scale" style:rel-height="scale">
          <draw:image xlink:href="media/image6.png" xlink:type="simple" xlink:show="embed" xlink:actuate="onLoad"/>
          <svg:title/>
          <svg:desc>A couple of kids sitting at a table

AI-generated content may be incorrect.</svg:desc>
        </draw:frame>
        <draw:frame draw:id="id102" draw:style-name="a709" draw:name="Picture 17" svg:x="-0.13958in" svg:y="5.10747in" svg:width="2.47372in" svg:height="2.47372in" style:rel-width="scale" style:rel-height="scale">
          <draw:image xlink:href="media/image7.png" xlink:type="simple" xlink:show="embed" xlink:actuate="onLoad"/>
          <svg:title/>
          <svg:desc>A magnifying glass with a black background</svg:desc>
        </draw:frame>
        <presentation:notes draw:style-name="a712">
          <draw:frame draw:id="id103" presentation:style-name="a710" draw:name="Google Shape;127;p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4" svg:x="0.75in" svg:y="1.25in" svg:width="6in" svg:height="3.375in" presentation:class="page" draw:id="id104" presentation:style-name="a711" draw:name="Google Shape;128;p4:notes">
            <svg:title/>
            <svg:desc/>
          </draw:page-thumbnail>
        </presentation:notes>
      </draw:page>
      <draw:page draw:name="Slide5" draw:style-name="a713" draw:master-page-name="Master2-Layout1-obj-OBJECT" presentation:presentation-page-layout-name="Master2-PPL1" draw:id="Slide-260">
        <draw:frame draw:id="id105" draw:style-name="a714" draw:name="Picture 3" svg:x="8.84905in" svg:y="4.92014in" svg:width="3.34396in" svg:height="2.57986in" style:rel-width="scale" style:rel-height="scale">
          <draw:image xlink:href="media/image8.jpeg" xlink:type="simple" xlink:show="embed" xlink:actuate="onLoad"/>
          <svg:title/>
          <svg:desc>Cartoon of stick figures holding pieces of puzzle together with text on them

AI-generated content may be incorrect.</svg:desc>
        </draw:frame>
        <draw:frame draw:id="id106" presentation:style-name="a717" draw:name="Google Shape;137;p19" svg:x="1.38in" svg:y="0.4in" svg:width="10.6in" svg:height="1.44965in" presentation:class="title" presentation:placeholder="false">
          <draw:text-box>
            <text:p text:style-name="a716" text:class-names="" text:cond-style-name=""><text:span text:style-name="a715" text:class-names="">Solution</text:span></text:p>
          </draw:text-box>
          <svg:title/>
          <svg:desc/>
        </draw:frame>
        <draw:frame draw:id="id107" presentation:style-name="a740" draw:name="Google Shape;138;p19" svg:x="1.96667in" svg:y="3.73746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8" text:class-names="">CV Parsing</text:span><text:span text:style-name="a719" text:class-names=""><text:s text:c="1"/>for extracting candidate details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2" text:class-names="">Automated Testing &amp; Interview Scheduling</text:span><text:span text:style-name="a723" text:class-names="">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6" text:class-names="">Matching Algorithm</text:span><text:span text:style-name="a727" text:class-names=""><text:s text:c="1"/>for fair ranking based on skills, test and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5"/>interview performance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User-Friendly Interface</text:span><text:span text:style-name="a734" text:class-names=""><text:s text:c="1"/>for HR and candidates.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  <draw:frame draw:id="id108" draw:style-name="a743" draw:name="Google Shape;139;p19" svg:x="12.35in" svg:y="6.75001in" svg:width="1in" svg:height="0.6493in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  <draw:frame draw:id="id109" draw:style-name="a744" draw:name="Google Shape;140;p19" svg:x="10.34302in" svg:y="0.31451in" svg:width="1.61032in" svg:height="1.61032in" style:rel-width="scale" style:rel-height="scale">
          <draw:image xlink:href="media/image1.png" xlink:type="simple" xlink:show="embed" xlink:actuate="onLoad"/>
          <svg:title/>
          <svg:desc>National University of Computer and Emerging Sciences - Wikipedia</svg:desc>
        </draw:frame>
        <draw:frame draw:id="id110" draw:style-name="a760" draw:name="TextBox 7" svg:x="1.46854in" svg:y="2.23586in" svg:width="6.67708in" svg:height="1.9696in">
          <draw:text-box>
            <text:p text:style-name="a748" text:class-names="" text:cond-style-name=""><text:span text:style-name="a745" text:class-names="">Auto-Match</text:span><text:span text:style-name="a746" text:class-names=""><text:s text:c="1"/>– Smart Recruitment System</text:span><text:span text:style-name="a747" text:class-names=""/></text:p>
            <text:list text:style-name="a753">
              <text:list-item>
                <text:p text:style-name="a752" text:class-names="" text:cond-style-name=""><text:span text:style-name="a749" text:class-names="">AI-based platform for<text:s text:c="1"/></text:span><text:span text:style-name="a750" text:class-names="">end-to-end recruitment</text:span><text:span text:style-name="a751" text:class-names="">.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Key Features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  <presentation:notes draw:style-name="a763">
          <draw:frame draw:id="id111" presentation:style-name="a761" draw:name="Google Shape;134;p5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5" svg:x="0.75in" svg:y="1.25in" svg:width="6in" svg:height="3.375in" presentation:class="page" draw:id="id112" presentation:style-name="a762" draw:name="Google Shape;135;p5:notes">
            <svg:title/>
            <svg:desc/>
          </draw:page-thumbnail>
        </presentation:notes>
      </draw:page>
      <draw:page draw:name="Slide6" draw:style-name="a764" draw:master-page-name="Master2-Layout1-obj-OBJECT" presentation:presentation-page-layout-name="Master2-PPL1" draw:id="Slide-261">
        <draw:frame draw:id="id113" presentation:style-name="a768" draw:name="Google Shape;145;p20" svg:x="1.38in" svg:y="0.23334in" svg:width="10.6in" svg:height="1.44965in" presentation:class="title" presentation:placeholder="false">
          <draw:text-box>
            <text:p text:style-name="a767" text:class-names="" text:cond-style-name=""><text:span text:style-name="a765" text:class-names="">Scope</text:span><text:span text:style-name="a766" text:class-names=""><text:s text:c="1"/>of the project</text:span></text:p>
          </draw:text-box>
          <svg:title/>
          <svg:desc/>
        </draw:frame>
        <draw:frame draw:id="id114" draw:style-name="a771" draw:name="Google Shape;147;p20" svg:x="12.35in" svg:y="6.75001in" svg:width="1in" svg:height="0.6493in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  <draw:frame draw:id="id115" draw:style-name="a772" draw:name="Google Shape;148;p20" svg:x="10.34302in" svg:y="0.31451in" svg:width="1.61032in" svg:height="1.61032in" style:rel-width="scale" style:rel-height="scale">
          <draw:image xlink:href="media/image1.png" xlink:type="simple" xlink:show="embed" xlink:actuate="onLoad"/>
          <svg:title/>
          <svg:desc>National University of Computer and Emerging Sciences - Wikipedia</svg:desc>
        </draw:frame>
        <draw:frame draw:id="id116" draw:style-name="a801" draw:name="Google Shape;146;p20" svg:x="1.43306in" svg:y="0.99467in" svg:width="10.46722in" svg:height="4.99541in">
          <draw:text-box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6" text:class-names="">Candidate Management:</text:span><text:span text:style-name="a777" text:class-names=""><text:s text:c="1"/>Registration, resume upload &amp; auto-data extraction</text:span></text:p>
              </text:list-item>
            </text:list>
            <text:list text:style-name="a783">
              <text:list-item>
                <text:p text:style-name="a782" text:class-names="" text:cond-style-name=""><text:span text:style-name="a780" text:class-names="">Assessment Engine:</text:span><text:span text:style-name="a781" text:class-names=""><text:s text:c="1"/>AI-generated, specific tests with cheating-prevention</text:span></text:p>
              </text:list-item>
            </text:list>
            <text:list text:style-name="a787">
              <text:list-item>
                <text:p text:style-name="a786" text:class-names="" text:cond-style-name=""><text:span text:style-name="a784" text:class-names="">AI Video Interviews:</text:span><text:span text:style-name="a785" text:class-names=""><text:s text:c="1"/>Identity verification, soft-skills evaluation, secure recordings</text:span></text:p>
              </text:list-item>
            </text:list>
            <text:list text:style-name="a793">
              <text:list-item>
                <text:p text:style-name="a792" text:class-names="" text:cond-style-name=""><text:span text:style-name="a788" text:class-names="">Smart Matching:</text:span><text:span text:style-name="a789" text:class-names=""><text:s text:c="1"/>Automated ranking &amp;<text:s text:c="1"/></text:span><text:span text:style-name="a790" text:class-names="">best-fit role suggestions</text:span><text:span text:style-name="a791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4" text:class-names="">HR Dashboard:</text:span><text:span text:style-name="a795" text:class-names=""><text:s text:c="1"/>Candidate profiles, test/interview results, interview playback, shortlisting tools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  <presentation:notes draw:style-name="a804">
          <draw:frame draw:id="id117" presentation:style-name="a802" draw:name="Google Shape;142;p6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6" svg:x="0.75in" svg:y="1.25in" svg:width="6in" svg:height="3.375in" presentation:class="page" draw:id="id118" presentation:style-name="a803" draw:name="Google Shape;143;p6:notes">
            <svg:title/>
            <svg:desc/>
          </draw:page-thumbnail>
        </presentation:notes>
      </draw:page>
      <draw:page draw:name="Slide7" draw:style-name="a805" draw:master-page-name="Master2-Layout1-obj-OBJECT" presentation:presentation-page-layout-name="Master2-PPL1" draw:id="Slide-262">
        <draw:frame draw:id="id119" draw:style-name="a806" draw:name="Picture 3" svg:x="8.93056in" svg:y="4.21267in" svg:width="3.72444in" svg:height="3.72444in" style:rel-width="scale" style:rel-height="scale">
          <draw:image xlink:href="media/image9.png" xlink:type="simple" xlink:show="embed" xlink:actuate="onLoad"/>
          <svg:title/>
          <svg:desc>A group of people with stars above them

AI-generated content may be incorrect.</svg:desc>
        </draw:frame>
        <draw:frame draw:id="id120" presentation:style-name="a809" draw:name="Google Shape;153;p21" svg:x="1.38in" svg:y="0.4in" svg:width="10.6in" svg:height="1.44965in" presentation:class="title" presentation:placeholder="false">
          <draw:text-box>
            <text:p text:style-name="a808" text:class-names="" text:cond-style-name=""><text:span text:style-name="a807" text:class-names="">Goals</text:span></text:p>
          </draw:text-box>
          <svg:title/>
          <svg:desc/>
        </draw:frame>
        <draw:frame draw:id="id121" presentation:style-name="a836" draw:name="Google Shape;154;p21" svg:x="1.38in" svg:y="2.15278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0" text:class-names="">Develop an<text:s text:c="1"/></text:span><text:span text:style-name="a811" text:class-names="">AI-powered recruitment system</text:span><text:span text:style-name="a812" text:class-names=""><text:s text:c="1"/>for academia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Ensure<text:s text:c="1"/></text:span><text:span text:style-name="a816" text:class-names="">fair and unbiased evaluations</text:span><text:span text:style-name="a817" text:class-names="">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0" text:class-names="">Provide universities with<text:s text:c="1"/></text:span><text:span text:style-name="a821" text:class-names="">easy-to-use dashboards</text:span><text:span text:style-name="a822" text:class-names="">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5" text:class-names="">Save<text:s text:c="1"/></text:span><text:span text:style-name="a826" text:class-names="">time and effort</text:span><text:span text:style-name="a827" text:class-names=""><text:s text:c="1"/>in the recruitment process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0" text:class-names="">Improve<text:s text:c="1"/></text:span><text:span text:style-name="a831" text:class-names="">quality of hiring decisions</text:span><text:span text:style-name="a832" text:class-names=""><text:s text:c="1"/>by recommending the best candidates</text:span><text:span text:style-name="a833" text:class-names=""/></text:p>
              </text:list-item>
            </text:list>
          </draw:text-box>
          <svg:title/>
          <svg:desc/>
        </draw:frame>
        <draw:frame draw:id="id122" draw:style-name="a839" draw:name="Google Shape;155;p21" svg:x="12.35in" svg:y="6.75001in" svg:width="1in" svg:height="0.6493in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  <presentation:notes draw:style-name="a842">
          <draw:frame draw:id="id123" presentation:style-name="a840" draw:name="Google Shape;150;p7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7" svg:x="0.75in" svg:y="1.25in" svg:width="6in" svg:height="3.375in" presentation:class="page" draw:id="id124" presentation:style-name="a841" draw:name="Google Shape;151;p7:notes">
            <svg:title/>
            <svg:desc/>
          </draw:page-thumbnail>
        </presentation:notes>
      </draw:page>
      <draw:page draw:name="Slide9" draw:style-name="a843" draw:master-page-name="Master2-Layout1-obj-OBJECT" presentation:presentation-page-layout-name="Master2-PPL1" draw:id="Slide-264">
        <draw:frame draw:id="id125" presentation:style-name="a846" draw:name="Google Shape;167;p23" svg:x="1.38in" svg:y="0.4in" svg:width="10.6in" svg:height="1.44965in" presentation:class="title" presentation:placeholder="false">
          <draw:text-box>
            <text:p text:style-name="a845" text:class-names="" text:cond-style-name=""><text:span text:style-name="a844" text:class-names="">Expected Result</text:span></text:p>
          </draw:text-box>
          <svg:title/>
          <svg:desc/>
        </draw:frame>
        <draw:frame draw:id="id126" presentation:style-name="a867" draw:name="Google Shape;168;p23" svg:x="1.38in" svg:y="2.00001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7" text:class-names="">A functional<text:s text:c="1"/></text:span><text:span text:style-name="a848" text:class-names="">Auto-Match prototype/system</text:span><text:span text:style-name="a849" text:class-names="">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Candidates</text:span><text:span text:style-name="a853" text:class-names=""><text:s text:c="1"/>: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2" text:class-names="">Human Resources</text:span><text:span text:style-name="a863" text:class-names=""><text:s text:c="1"/>:</text:span><text:span text:style-name="a864" text:class-names=""/></text:p>
              </text:list-item>
            </text:list>
          </draw:text-box>
          <svg:title/>
          <svg:desc/>
        </draw:frame>
        <draw:frame draw:id="id127" draw:style-name="a870" draw:name="Google Shape;169;p23" svg:x="12.35in" svg:y="6.75001in" svg:width="1in" svg:height="0.6493in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  <draw:frame draw:id="id128" draw:style-name="a892" draw:name="Google Shape;168;p23" svg:x="1.845in" svg:y="5.00607in" svg:width="6.14778in" svg:height="2.09392in">
          <draw:text-box>
            <text:list text:style-name="a875">
              <text:list-item>
                <text:p text:style-name="a874" text:class-names="" text:cond-style-name=""><text:span text:style-name="a871" text:class-names="">Access<text:s text:c="1"/></text:span><text:span text:style-name="a872" text:class-names="">automated candidate rankings</text:span><text:span text:style-name="a873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Review<text:s text:c="1"/></text:span><text:span text:style-name="a877" text:class-names="">test results &amp; recorded interviews</text:span><text:span text:style-name="a878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Identify best-fit candidates by<text:s text:c="1"/></text:span><text:span text:style-name="a882" text:class-names="">matching</text:span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Make faster &amp; more reliable hiring decisions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  <draw:frame draw:id="id129" draw:style-name="a902" draw:name="Google Shape;168;p23" svg:x="1.845in" svg:y="3.06112in" svg:width="6.14778in" svg:height="2.09392in">
          <draw:text-box>
            <text:list text:style-name="a895">
              <text:list-item>
                <text:p text:style-name="a894" text:class-names="" text:cond-style-name=""><text:span text:style-name="a893" text:class-names="">Register &amp; upload CVs.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Attempt AI-generated tests.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Give AI-monitored video interviews.</text:span></text:p>
              </text:list-item>
            </text:list>
          </draw:text-box>
          <svg:title/>
          <svg:desc/>
        </draw:frame>
        <draw:g draw:name="Group 34" draw:id="id130">
          <svg:title/>
          <svg:desc/>
          <draw:g draw:name="Group 32" draw:id="id131">
            <svg:title/>
            <svg:desc/>
            <draw:frame draw:id="id133" draw:style-name="a906" draw:name="Picture 31" svg:x="6.95861in" svg:y="1.77517in" svg:width="5.20833in" svg:height="5.20833in" style:rel-width="scale" style:rel-height="scale">
              <draw:image xlink:href="media/image10.png" xlink:type="simple" xlink:show="embed" xlink:actuate="onLoad"/>
              <svg:title/>
              <svg:desc>A black background with blue text

AI-generated content may be incorrect.</svg:desc>
            </draw:frame>
            <draw:frame draw:id="id134" draw:style-name="a909" draw:name="TextBox 10" svg:x="7.64352in" svg:y="2.27229in" svg:width="1.91926in" svg:height="0.43757in">
              <draw:text-box>
                <text:p text:style-name="a908" text:class-names="" text:cond-style-name=""><text:span text:style-name="a907" text:class-names="">Smart Hiring</text:span></text:p>
              </draw:text-box>
              <svg:title/>
              <svg:desc/>
            </draw:frame>
          </draw:g>
          <draw:frame draw:id="id132" draw:style-name="a905" draw:name="TextBox 33" svg:x="7.48867in" svg:y="4.13032in" svg:width="1.59588in" svg:height="0.43757in">
            <draw:text-box>
              <text:p text:style-name="a904" text:class-names="" text:cond-style-name=""><text:span text:style-name="a903" text:class-names="">empowers</text:span></text:p>
            </draw:text-box>
            <svg:title/>
            <svg:desc/>
          </draw:frame>
        </draw:g>
        <presentation:notes draw:style-name="a912">
          <draw:frame draw:id="id135" presentation:style-name="a910" draw:name="Google Shape;164;p9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8" svg:x="0.75in" svg:y="1.25in" svg:width="6in" svg:height="3.375in" presentation:class="page" draw:id="id136" presentation:style-name="a911" draw:name="Google Shape;165;p9:notes">
            <svg:title/>
            <svg:desc/>
          </draw:page-thumbnail>
        </presentation:notes>
      </draw:page>
      <draw:page draw:name="Slide17" draw:style-name="a913" draw:master-page-name="Master2-Layout2-twoObj-TWO_OBJECTS" presentation:presentation-page-layout-name="Master2-PPL2" draw:id="Slide-272">
        <draw:frame draw:id="id137" presentation:style-name="a917" draw:name="Google Shape;167;p23" svg:x="4.18539in" svg:y="0.71301in" svg:width="4.06545in" svg:height="1.44965in" presentation:class="title" presentation:placeholder="false">
          <draw:text-box>
            <text:p text:style-name="a916" text:class-names="" text:cond-style-name=""><text:span text:style-name="a914" text:class-names="">Diagrams</text:span><text:span text:style-name="a915" text:class-names=""/></text:p>
          </draw:text-box>
          <svg:title/>
          <svg:desc/>
        </draw:frame>
        <draw:frame draw:id="id138" draw:style-name="a918" draw:name="Picture 2" svg:x="2.71458in" svg:y="3.50153in" svg:width="7.4375in" svg:height="2.80402in" style:rel-width="scale" style:rel-height="scale">
          <draw:image xlink:href="media/image11.png" xlink:type="simple" xlink:show="embed" xlink:actuate="onLoad"/>
          <svg:title/>
          <svg:desc/>
        </draw:frame>
        <draw:custom-shape svg:x="2.84444in" svg:y="6.4in" svg:width="7.91111in" svg:height="0.53333in" draw:id="id139" draw:style-name="a921" draw:name="Oval 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8" draw:style-name="a922" draw:master-page-name="Master2-Layout2-twoObj-TWO_OBJECTS" presentation:presentation-page-layout-name="Master2-PPL2" draw:id="Slide-273">
        <draw:frame draw:id="id140" draw:style-name="a923" draw:name="Picture 5" svg:x="2.89815in" svg:y="0.10163in" svg:width="5.91102in" svg:height="7.5in" style:rel-width="scale" style:rel-height="scale">
          <draw:image xlink:href="media/image12.png" xlink:type="simple" xlink:show="embed" xlink:actuate="onLoad"/>
          <svg:title/>
          <svg:desc>A screenshot of a computer

AI-generated content may be incorrect.</svg:desc>
        </draw:frame>
      </draw:page>
      <draw:page draw:name="Slide19" draw:style-name="a924" draw:master-page-name="Master2-Layout2-twoObj-TWO_OBJECTS" presentation:presentation-page-layout-name="Master2-PPL2" draw:id="Slide-274">
        <draw:frame draw:id="id141" draw:style-name="a925" draw:name="Picture 5" svg:x="3.79811in" svg:y="0.0813in" svg:width="5.20865in" svg:height="7.5in" style:rel-width="scale" style:rel-height="scale">
          <draw:image xlink:href="media/image13.png" xlink:type="simple" xlink:show="embed" xlink:actuate="onLoad"/>
          <svg:title/>
          <svg:desc>A diagram of a company

AI-generated content may be incorrect.</svg:desc>
        </draw:frame>
      </draw:page>
      <draw:page draw:name="Slide20" draw:style-name="a926" draw:master-page-name="Master2-Layout2-twoObj-TWO_OBJECTS" presentation:presentation-page-layout-name="Master2-PPL2" draw:id="Slide-275">
        <draw:frame draw:id="id142" draw:style-name="a927" draw:name="Picture 5" svg:x="4.14589in" svg:y="0in" svg:width="5.04156in" svg:height="7.5in" style:rel-width="scale" style:rel-height="scale">
          <draw:image xlink:href="media/image14.png" xlink:type="simple" xlink:show="embed" xlink:actuate="onLoad"/>
          <svg:title/>
          <svg:desc>A screenshot of a computer</svg:desc>
        </draw:frame>
      </draw:page>
      <draw:page draw:name="Slide24" draw:style-name="a928" draw:master-page-name="Master2-Layout2-twoObj-TWO_OBJECTS" presentation:presentation-page-layout-name="Master2-PPL2" draw:id="Slide-279">
        <draw:frame draw:id="id143" draw:style-name="a929" draw:name="Picture 5" svg:x="2.45317in" svg:y="0in" svg:width="7.57333in" svg:height="7.5in" style:rel-width="scale" style:rel-height="scale">
          <draw:image xlink:href="media/image15.png" xlink:type="simple" xlink:show="embed" xlink:actuate="onLoad"/>
          <svg:title/>
          <svg:desc>A screenshot of a computer</svg:desc>
        </draw:frame>
      </draw:page>
      <draw:page draw:name="Slide25" draw:style-name="a930" draw:master-page-name="Master2-Layout2-twoObj-TWO_OBJECTS" presentation:presentation-page-layout-name="Master2-PPL2" draw:id="Slide-280">
        <draw:frame draw:id="id144" draw:style-name="a931" draw:name="Picture 5" svg:x="0.3938in" svg:y="0in" svg:width="11.875in" svg:height="7.5in" style:rel-width="scale" style:rel-height="scale">
          <draw:image xlink:href="media/image16.png" xlink:type="simple" xlink:show="embed" xlink:actuate="onLoad"/>
          <svg:title/>
          <svg:desc>A black screen with white squares

AI-generated content may be incorrect.</svg:desc>
        </draw:frame>
      </draw:page>
      <draw:page draw:name="Slide21" draw:style-name="a932" draw:master-page-name="Master2-Layout2-twoObj-TWO_OBJECTS" presentation:presentation-page-layout-name="Master2-PPL2" draw:id="Slide-276">
        <draw:frame draw:id="id145" draw:style-name="a933" draw:name="Picture 5" svg:x="0.82317in" svg:y="1.548in" svg:width="10.63008in" svg:height="4.73937in" style:rel-width="scale" style:rel-height="scale">
          <draw:image xlink:href="media/image17.png" xlink:type="simple" xlink:show="embed" xlink:actuate="onLoad"/>
          <svg:title/>
          <svg:desc>A diagram of a cloud storage system</svg:desc>
        </draw:frame>
      </draw:page>
      <draw:page draw:name="Slide22" draw:style-name="a934" draw:master-page-name="Master2-Layout2-twoObj-TWO_OBJECTS" presentation:presentation-page-layout-name="Master2-PPL2" draw:id="Slide-277">
        <draw:frame draw:id="id146" draw:style-name="a935" draw:name="Picture 5" svg:x="-0.15244in" svg:y="0.43525in" svg:width="12.43902in" svg:height="6.63966in" style:rel-width="scale" style:rel-height="scale">
          <draw:image xlink:href="media/image18.png" xlink:type="simple" xlink:show="embed" xlink:actuate="onLoad"/>
          <svg:title/>
          <svg:desc>A screenshot of a computer</svg:desc>
        </draw:frame>
      </draw:page>
      <draw:page draw:name="Slide23" draw:style-name="a936" draw:master-page-name="Master2-Layout2-twoObj-TWO_OBJECTS" presentation:presentation-page-layout-name="Master2-PPL2" draw:id="Slide-278">
        <draw:frame draw:id="id147" draw:style-name="a937" draw:name="Picture 6" svg:x="2.75318in" svg:y="0in" svg:width="5.48958in" svg:height="7.5in" style:rel-width="scale" style:rel-height="scale">
          <draw:image xlink:href="media/image19.png" xlink:type="simple" xlink:show="embed" xlink:actuate="onLoad"/>
          <svg:title/>
          <svg:desc>A screenshot of a computer

AI-generated content may be incorrect.</svg:desc>
        </draw:frame>
      </draw:page>
      <draw:page draw:name="Slide26" draw:style-name="a938" draw:master-page-name="Master2-Layout2-twoObj-TWO_OBJECTS" presentation:presentation-page-layout-name="Master2-PPL2" draw:id="Slide-281">
        <draw:frame draw:id="id148" presentation:style-name="a941" draw:name="Google Shape;167;p23" svg:x="4.63254in" svg:y="0.80448in" svg:width="4.06545in" svg:height="1.44965in" presentation:class="title" presentation:placeholder="false">
          <draw:text-box>
            <text:p text:style-name="a940" text:class-names="" text:cond-style-name=""><text:span text:style-name="a939" text:class-names="">Timeline</text:span></text:p>
          </draw:text-box>
          <svg:title/>
          <svg:desc/>
        </draw:frame>
        <draw:frame draw:id="id149" draw:style-name="a942" draw:name="Picture 8" svg:x="2.71458in" svg:y="3.50153in" svg:width="7.4375in" svg:height="2.80402in" style:rel-width="scale" style:rel-height="scale">
          <draw:image xlink:href="media/image11.png" xlink:type="simple" xlink:show="embed" xlink:actuate="onLoad"/>
          <svg:title/>
          <svg:desc/>
        </draw:frame>
        <draw:custom-shape svg:x="2.84444in" svg:y="6.4in" svg:width="7.91111in" svg:height="0.53333in" draw:id="id150" draw:style-name="a945" draw:name="Oval 10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8" draw:style-name="a946" draw:master-page-name="Master2-Layout1-obj-OBJECT" presentation:presentation-page-layout-name="Master2-PPL1" draw:id="Slide-263">
        <draw:frame draw:id="id151" presentation:style-name="a949" draw:name="Google Shape;160;p22" svg:x="0.23611in" svg:y="-0.27306in" svg:width="10.6in" svg:height="1.44965in" presentation:class="title" presentation:placeholder="false">
          <draw:text-box>
            <text:p text:style-name="a948" text:class-names="" text:cond-style-name=""><text:span text:style-name="a947" text:class-names="">Objectives</text:span></text:p>
          </draw:text-box>
          <svg:title/>
          <svg:desc/>
        </draw:frame>
        <draw:frame draw:id="id152" draw:style-name="a952" draw:name="Google Shape;162;p22" svg:x="12.35in" svg:y="6.75001in" svg:width="1in" svg:height="0.6493in">
          <draw:text-box>
            <text:p text:style-name="a951" text:class-names="" text:cond-style-name=""><text:span text:style-name="a950" text:class-names=""><text:page-number style:num-format="1" text:fixed="false"/></text:span></text:p>
          </draw:text-box>
          <svg:title/>
          <svg:desc/>
        </draw:frame>
        <draw:frame draw:id="id153" draw:name="Table 3" svg:x="0in" svg:y="1.49191in" svg:width="12.34999in" svg:height="5.99456in">
          <table:table table:style-name="a953" table:template-name="{8A107856-5554-42FB-B03E-39F5DBC370BA}" table:use-banding-columns-styles="false" table:use-banding-rows-styles="false" table:use-first-column-styles="false" table:use-first-row-styles="false" table:use-last-column-styles="false" table:use-last-row-styles="false">
            <table:table-column table:style-name="a954" table:default-cell-style-name=""/>
            <table:table-column table:style-name="a955" table:default-cell-style-name=""/>
            <table:table-column table:style-name="a956" table:default-cell-style-name=""/>
            <table:table-column table:style-name="a957" table:default-cell-style-name=""/>
            <table:table-column table:style-name="a958" table:default-cell-style-name=""/>
            <table:table-column table:style-name="a959" table:default-cell-style-name=""/>
            <table:table-column table:style-name="a960" table:default-cell-style-name=""/>
            <table:table-column table:style-name="a961" table:default-cell-style-name=""/>
            <table:table-column table:style-name="a962" table:default-cell-style-name=""/>
            <table:table-column table:style-name="a963" table:default-cell-style-name=""/>
            <table:table-row table:style-name="a964" table:default-cell-style-name="">
              <table:table-cell table:style-name="a967">
                <text:p text:style-name="a966" text:class-names="" text:cond-style-name=""><text:span text:style-name="a965" text:class-names="">Task name<text:s text:c="1"/></text:span></text:p>
              </table:table-cell>
              <table:table-cell table:style-name="a970">
                <text:p text:style-name="a969" text:class-names="" text:cond-style-name=""><text:span text:style-name="a968" text:class-names="">FYP Part</text:span></text:p>
              </table:table-cell>
              <table:table-cell table:style-name="a973">
                <text:p text:style-name="a972" text:class-names="" text:cond-style-name=""><text:span text:style-name="a971" text:class-names="">Month 1</text:span></text:p>
              </table:table-cell>
              <table:table-cell table:style-name="a976">
                <text:p text:style-name="a975" text:class-names="" text:cond-style-name=""><text:span text:style-name="a974" text:class-names="">Month 2</text:span></text:p>
              </table:table-cell>
              <table:table-cell table:style-name="a979">
                <text:p text:style-name="a978" text:class-names="" text:cond-style-name=""><text:span text:style-name="a977" text:class-names="">Month 3</text:span></text:p>
              </table:table-cell>
              <table:table-cell table:style-name="a982">
                <text:p text:style-name="a981" text:class-names="" text:cond-style-name=""><text:span text:style-name="a980" text:class-names="">Month 4</text:span></text:p>
              </table:table-cell>
              <table:table-cell table:style-name="a985">
                <text:p text:style-name="a984" text:class-names="" text:cond-style-name=""><text:span text:style-name="a983" text:class-names="">Month 5</text:span></text:p>
              </table:table-cell>
              <table:table-cell table:style-name="a988">
                <text:p text:style-name="a987" text:class-names="" text:cond-style-name=""><text:span text:style-name="a986" text:class-names="">Month 6</text:span></text:p>
              </table:table-cell>
              <table:table-cell table:style-name="a991">
                <text:p text:style-name="a990" text:class-names="" text:cond-style-name=""><text:span text:style-name="a989" text:class-names="">Month 7</text:span></text:p>
              </table:table-cell>
              <table:table-cell table:style-name="a994">
                <text:p text:style-name="a993" text:class-names="" text:cond-style-name=""><text:span text:style-name="a992" text:class-names="">Month 8</text:span></text:p>
              </table:table-cell>
            </table:table-row>
            <table:table-row table:style-name="a995" table:default-cell-style-name="">
              <table:table-cell table:style-name="a998">
                <text:p text:style-name="a997" text:class-names="" text:cond-style-name=""><text:span text:style-name="a996" text:class-names="">Requirements gathering &amp; stakeholder analysis</text:span></text:p>
              </table:table-cell>
              <table:table-cell table:style-name="a1001">
                <text:p text:style-name="a1000" text:class-names="" text:cond-style-name=""><text:span text:style-name="a999" text:class-names="">FYP 1</text:span></text:p>
              </table:table-cell>
              <table:table-cell table:style-name="a1004">
                <text:p text:style-name="a1003" text:class-names="" text:cond-style-name=""><text:span text:style-name="a1002" text:class-names=""/></text:p>
              </table:table-cell>
              <table:table-cell table:style-name="a1007">
                <text:p text:style-name="a1006" text:class-names="" text:cond-style-name=""><text:span text:style-name="a1005" text:class-names=""/></text:p>
              </table:table-cell>
              <table:table-cell table:style-name="a1010">
                <text:p text:style-name="a1009" text:class-names="" text:cond-style-name=""><text:span text:style-name="a1008" text:class-names=""/></text:p>
              </table:table-cell>
              <table:table-cell table:style-name="a1013">
                <text:p text:style-name="a1012" text:class-names="" text:cond-style-name=""><text:span text:style-name="a1011" text:class-names=""/></text:p>
              </table:table-cell>
              <table:table-cell table:style-name="a1016">
                <text:p text:style-name="a1015" text:class-names="" text:cond-style-name=""><text:span text:style-name="a1014" text:class-names=""/></text:p>
              </table:table-cell>
              <table:table-cell table:style-name="a1019">
                <text:p text:style-name="a1018" text:class-names="" text:cond-style-name=""><text:span text:style-name="a1017" text:class-names=""/></text:p>
              </table:table-cell>
              <table:table-cell table:style-name="a1022">
                <text:p text:style-name="a1021" text:class-names="" text:cond-style-name=""><text:span text:style-name="a1020" text:class-names=""/></text:p>
              </table:table-cell>
              <table:table-cell table:style-name="a1025">
                <text:p text:style-name="a1024" text:class-names="" text:cond-style-name=""><text:span text:style-name="a1023" text:class-names=""/></text:p>
              </table:table-cell>
            </table:table-row>
            <table:table-row table:style-name="a1026" table:default-cell-style-name="">
              <table:table-cell table:style-name="a1029">
                <text:p text:style-name="a1028" text:class-names="" text:cond-style-name=""><text:span text:style-name="a1027" text:class-names="">Define MVP, user personas &amp; architecture</text:span></text:p>
              </table:table-cell>
              <table:table-cell table:style-name="a1032">
                <text:p text:style-name="a1031" text:class-names="" text:cond-style-name=""><text:span text:style-name="a1030" text:class-names="">FYP 1</text:span></text:p>
              </table:table-cell>
              <table:table-cell table:style-name="a1035">
                <text:p text:style-name="a1034" text:class-names="" text:cond-style-name=""><text:span text:style-name="a1033" text:class-names=""/></text:p>
              </table:table-cell>
              <table:table-cell table:style-name="a1038">
                <text:p text:style-name="a1037" text:class-names="" text:cond-style-name=""><text:span text:style-name="a1036" text:class-names=""/></text:p>
              </table:table-cell>
              <table:table-cell table:style-name="a1041">
                <text:p text:style-name="a1040" text:class-names="" text:cond-style-name=""><text:span text:style-name="a1039" text:class-names=""/></text:p>
              </table:table-cell>
              <table:table-cell table:style-name="a1044">
                <text:p text:style-name="a1043" text:class-names="" text:cond-style-name=""><text:span text:style-name="a1042" text:class-names=""/></text:p>
              </table:table-cell>
              <table:table-cell table:style-name="a1047">
                <text:p text:style-name="a1046" text:class-names="" text:cond-style-name=""><text:span text:style-name="a1045" text:class-names=""/></text:p>
              </table:table-cell>
              <table:table-cell table:style-name="a1050">
                <text:p text:style-name="a1049" text:class-names="" text:cond-style-name=""><text:span text:style-name="a1048" text:class-names=""/></text:p>
              </table:table-cell>
              <table:table-cell table:style-name="a1053">
                <text:p text:style-name="a1052" text:class-names="" text:cond-style-name=""><text:span text:style-name="a1051" text:class-names=""/></text:p>
              </table:table-cell>
              <table:table-cell table:style-name="a1056">
                <text:p text:style-name="a1055" text:class-names="" text:cond-style-name=""><text:span text:style-name="a1054" text:class-names=""/></text:p>
              </table:table-cell>
            </table:table-row>
            <table:table-row table:style-name="a1057" table:default-cell-style-name="">
              <table:table-cell table:style-name="a1060">
                <text:p text:style-name="a1059" text:class-names="" text:cond-style-name=""><text:span text:style-name="a1058" text:class-names="">Wireframing (low-fidelity)</text:span></text:p>
              </table:table-cell>
              <table:table-cell table:style-name="a1063">
                <text:p text:style-name="a1062" text:class-names="" text:cond-style-name=""><text:span text:style-name="a1061" text:class-names="">FYP 1</text:span></text:p>
              </table:table-cell>
              <table:table-cell table:style-name="a1066">
                <text:p text:style-name="a1065" text:class-names="" text:cond-style-name=""><text:span text:style-name="a1064" text:class-names=""/></text:p>
              </table:table-cell>
              <table:table-cell table:style-name="a1069">
                <text:p text:style-name="a1068" text:class-names="" text:cond-style-name=""><text:span text:style-name="a1067" text:class-names=""/></text:p>
              </table:table-cell>
              <table:table-cell table:style-name="a1072">
                <text:p text:style-name="a1071" text:class-names="" text:cond-style-name=""><text:span text:style-name="a1070" text:class-names=""/></text:p>
              </table:table-cell>
              <table:table-cell table:style-name="a1075">
                <text:p text:style-name="a1074" text:class-names="" text:cond-style-name=""><text:span text:style-name="a1073" text:class-names=""/></text:p>
              </table:table-cell>
              <table:table-cell table:style-name="a1078">
                <text:p text:style-name="a1077" text:class-names="" text:cond-style-name=""><text:span text:style-name="a1076" text:class-names=""/></text:p>
              </table:table-cell>
              <table:table-cell table:style-name="a1081">
                <text:p text:style-name="a1080" text:class-names="" text:cond-style-name=""><text:span text:style-name="a1079" text:class-names=""/></text:p>
              </table:table-cell>
              <table:table-cell table:style-name="a1084">
                <text:p text:style-name="a1083" text:class-names="" text:cond-style-name=""><text:span text:style-name="a1082" text:class-names=""/></text:p>
              </table:table-cell>
              <table:table-cell table:style-name="a1087">
                <text:p text:style-name="a1086" text:class-names="" text:cond-style-name=""><text:span text:style-name="a1085" text:class-names=""/></text:p>
              </table:table-cell>
            </table:table-row>
            <table:table-row table:style-name="a1088" table:default-cell-style-name="">
              <table:table-cell table:style-name="a1091">
                <text:p text:style-name="a1090" text:class-names="" text:cond-style-name=""><text:span text:style-name="a1089" text:class-names="">High-fidelity UI design</text:span></text:p>
              </table:table-cell>
              <table:table-cell table:style-name="a1094">
                <text:p text:style-name="a1093" text:class-names="" text:cond-style-name=""><text:span text:style-name="a1092" text:class-names="">FYP 1</text:span></text:p>
              </table:table-cell>
              <table:table-cell table:style-name="a1097">
                <text:p text:style-name="a1096" text:class-names="" text:cond-style-name=""><text:span text:style-name="a1095" text:class-names=""/></text:p>
              </table:table-cell>
              <table:table-cell table:style-name="a1100">
                <text:p text:style-name="a1099" text:class-names="" text:cond-style-name=""><text:span text:style-name="a1098" text:class-names=""/></text:p>
              </table:table-cell>
              <table:table-cell table:style-name="a1103">
                <text:p text:style-name="a1102" text:class-names="" text:cond-style-name=""><text:span text:style-name="a1101" text:class-names=""/></text:p>
              </table:table-cell>
              <table:table-cell table:style-name="a1106">
                <text:p text:style-name="a1105" text:class-names="" text:cond-style-name=""><text:span text:style-name="a1104" text:class-names=""/></text:p>
              </table:table-cell>
              <table:table-cell table:style-name="a1109">
                <text:p text:style-name="a1108" text:class-names="" text:cond-style-name=""><text:span text:style-name="a1107" text:class-names=""/></text:p>
              </table:table-cell>
              <table:table-cell table:style-name="a1112">
                <text:p text:style-name="a1111" text:class-names="" text:cond-style-name=""><text:span text:style-name="a1110" text:class-names=""/></text:p>
              </table:table-cell>
              <table:table-cell table:style-name="a1115">
                <text:p text:style-name="a1114" text:class-names="" text:cond-style-name=""><text:span text:style-name="a1113" text:class-names=""/></text:p>
              </table:table-cell>
              <table:table-cell table:style-name="a1118">
                <text:p text:style-name="a1117" text:class-names="" text:cond-style-name=""><text:span text:style-name="a1116" text:class-names=""/></text:p>
              </table:table-cell>
            </table:table-row>
            <table:table-row table:style-name="a1119" table:default-cell-style-name="">
              <table:table-cell table:style-name="a1122">
                <text:p text:style-name="a1121" text:class-names="" text:cond-style-name=""><text:span text:style-name="a1120" text:class-names="">Database schema &amp; backend design</text:span></text:p>
              </table:table-cell>
              <table:table-cell table:style-name="a1125">
                <text:p text:style-name="a1124" text:class-names="" text:cond-style-name=""><text:span text:style-name="a1123" text:class-names="">FYP 1</text:span></text:p>
              </table:table-cell>
              <table:table-cell table:style-name="a1128">
                <text:p text:style-name="a1127" text:class-names="" text:cond-style-name=""><text:span text:style-name="a1126" text:class-names=""/></text:p>
              </table:table-cell>
              <table:table-cell table:style-name="a1131">
                <text:p text:style-name="a1130" text:class-names="" text:cond-style-name=""><text:span text:style-name="a1129" text:class-names=""/></text:p>
              </table:table-cell>
              <table:table-cell table:style-name="a1134">
                <text:p text:style-name="a1133" text:class-names="" text:cond-style-name=""><text:span text:style-name="a1132" text:class-names=""/></text:p>
              </table:table-cell>
              <table:table-cell table:style-name="a1137">
                <text:p text:style-name="a1136" text:class-names="" text:cond-style-name=""><text:span text:style-name="a1135" text:class-names=""/></text:p>
              </table:table-cell>
              <table:table-cell table:style-name="a1140">
                <text:p text:style-name="a1139" text:class-names="" text:cond-style-name=""><text:span text:style-name="a1138" text:class-names=""/></text:p>
              </table:table-cell>
              <table:table-cell table:style-name="a1143">
                <text:p text:style-name="a1142" text:class-names="" text:cond-style-name=""><text:span text:style-name="a1141" text:class-names=""/></text:p>
              </table:table-cell>
              <table:table-cell table:style-name="a1146">
                <text:p text:style-name="a1145" text:class-names="" text:cond-style-name=""><text:span text:style-name="a1144" text:class-names=""/></text:p>
              </table:table-cell>
              <table:table-cell table:style-name="a1149">
                <text:p text:style-name="a1148" text:class-names="" text:cond-style-name=""><text:span text:style-name="a1147" text:class-names=""/></text:p>
              </table:table-cell>
            </table:table-row>
            <table:table-row table:style-name="a1150" table:default-cell-style-name="">
              <table:table-cell table:style-name="a1154">
                <text:p text:style-name="a1153" text:class-names="" text:cond-style-name=""><text:span text:style-name="a1151" text:class-names="">Candidate portal (registration &amp; CV upload)</text:span><text:span text:style-name="a1152" text:class-names=""/></text:p>
              </table:table-cell>
              <table:table-cell table:style-name="a1157">
                <text:p text:style-name="a1156" text:class-names="" text:cond-style-name=""><text:span text:style-name="a1155" text:class-names="">FYP 1</text:span></text:p>
              </table:table-cell>
              <table:table-cell table:style-name="a1160">
                <text:p text:style-name="a1159" text:class-names="" text:cond-style-name=""><text:span text:style-name="a1158" text:class-names=""/></text:p>
              </table:table-cell>
              <table:table-cell table:style-name="a1163">
                <text:p text:style-name="a1162" text:class-names="" text:cond-style-name=""><text:span text:style-name="a1161" text:class-names=""/></text:p>
              </table:table-cell>
              <table:table-cell table:style-name="a1166">
                <text:p text:style-name="a1165" text:class-names="" text:cond-style-name=""><text:span text:style-name="a1164" text:class-names=""/></text:p>
              </table:table-cell>
              <table:table-cell table:style-name="a1169">
                <text:p text:style-name="a1168" text:class-names="" text:cond-style-name=""><text:span text:style-name="a1167" text:class-names=""/></text:p>
              </table:table-cell>
              <table:table-cell table:style-name="a1172">
                <text:p text:style-name="a1171" text:class-names="" text:cond-style-name=""><text:span text:style-name="a1170" text:class-names=""/></text:p>
              </table:table-cell>
              <table:table-cell table:style-name="a1175">
                <text:p text:style-name="a1174" text:class-names="" text:cond-style-name=""><text:span text:style-name="a1173" text:class-names=""/></text:p>
              </table:table-cell>
              <table:table-cell table:style-name="a1178">
                <text:p text:style-name="a1177" text:class-names="" text:cond-style-name=""><text:span text:style-name="a1176" text:class-names=""/></text:p>
              </table:table-cell>
              <table:table-cell table:style-name="a1181">
                <text:p text:style-name="a1180" text:class-names="" text:cond-style-name=""><text:span text:style-name="a1179" text:class-names=""/></text:p>
              </table:table-cell>
            </table:table-row>
            <table:table-row table:style-name="a1182" table:default-cell-style-name="">
              <table:table-cell table:style-name="a1186">
                <text:p text:style-name="a1185" text:class-names="" text:cond-style-name=""><text:span text:style-name="a1183" text:class-names="">HR dashboard (basic job panel)</text:span><text:span text:style-name="a1184" text:class-names=""/></text:p>
              </table:table-cell>
              <table:table-cell table:style-name="a1189">
                <text:p text:style-name="a1188" text:class-names="" text:cond-style-name=""><text:span text:style-name="a1187" text:class-names="">FYP 1</text:span></text:p>
              </table:table-cell>
              <table:table-cell table:style-name="a1192">
                <text:p text:style-name="a1191" text:class-names="" text:cond-style-name=""><text:span text:style-name="a1190" text:class-names=""/></text:p>
              </table:table-cell>
              <table:table-cell table:style-name="a1195">
                <text:p text:style-name="a1194" text:class-names="" text:cond-style-name=""><text:span text:style-name="a1193" text:class-names=""/></text:p>
              </table:table-cell>
              <table:table-cell table:style-name="a1198">
                <text:p text:style-name="a1197" text:class-names="" text:cond-style-name=""><text:span text:style-name="a1196" text:class-names=""/></text:p>
              </table:table-cell>
              <table:table-cell table:style-name="a1201">
                <text:p text:style-name="a1200" text:class-names="" text:cond-style-name=""><text:span text:style-name="a1199" text:class-names=""/></text:p>
              </table:table-cell>
              <table:table-cell table:style-name="a1204">
                <text:p text:style-name="a1203" text:class-names="" text:cond-style-name=""><text:span text:style-name="a1202" text:class-names=""/></text:p>
              </table:table-cell>
              <table:table-cell table:style-name="a1207">
                <text:p text:style-name="a1206" text:class-names="" text:cond-style-name=""><text:span text:style-name="a1205" text:class-names=""/></text:p>
              </table:table-cell>
              <table:table-cell table:style-name="a1210">
                <text:p text:style-name="a1209" text:class-names="" text:cond-style-name=""><text:span text:style-name="a1208" text:class-names=""/></text:p>
              </table:table-cell>
              <table:table-cell table:style-name="a1213">
                <text:p text:style-name="a1212" text:class-names="" text:cond-style-name=""><text:span text:style-name="a1211" text:class-names=""/></text:p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presentation:notes draw:style-name="a1216">
          <draw:frame draw:id="id154" presentation:style-name="a1214" draw:name="Google Shape;157;p8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9" svg:x="0.75in" svg:y="1.25in" svg:width="6in" svg:height="3.375in" presentation:class="page" draw:id="id155" presentation:style-name="a1215" draw:name="Google Shape;158;p8:notes">
            <svg:title/>
            <svg:desc/>
          </draw:page-thumbnail>
        </presentation:notes>
      </draw:page>
      <draw:page draw:name="Slide12" draw:style-name="a1217" draw:master-page-name="Master2-Layout1-obj-OBJECT" presentation:presentation-page-layout-name="Master2-PPL1" draw:id="Slide-267">
        <draw:frame draw:id="id156" draw:style-name="a1220" draw:name="Google Shape;162;p22" svg:x="12.35in" svg:y="6.75001in" svg:width="1in" svg:height="0.6493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157" draw:name="Table 3" svg:x="0in" svg:y="1.68153in" svg:width="12.34999in" svg:height="5.81847in">
          <table:table table:style-name="a1221" table:template-name="{8A107856-5554-42FB-B03E-39F5DBC370B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22" table:default-cell-style-name=""/>
            <table:table-column table:style-name="a1223" table:default-cell-style-name=""/>
            <table:table-column table:style-name="a1224" table:default-cell-style-name=""/>
            <table:table-column table:style-name="a1225" table:default-cell-style-name=""/>
            <table:table-column table:style-name="a1226" table:default-cell-style-name=""/>
            <table:table-column table:style-name="a1227" table:default-cell-style-name=""/>
            <table:table-column table:style-name="a1228" table:default-cell-style-name=""/>
            <table:table-column table:style-name="a1229" table:default-cell-style-name=""/>
            <table:table-column table:style-name="a1230" table:default-cell-style-name=""/>
            <table:table-column table:style-name="a1231" table:default-cell-style-name=""/>
            <table:table-row table:style-name="a1232" table:default-cell-style-name="">
              <table:table-cell table:style-name="a1235">
                <text:p text:style-name="a1234" text:class-names="" text:cond-style-name=""><text:span text:style-name="a1233" text:class-names="">Task name</text:span></text:p>
              </table:table-cell>
              <table:table-cell table:style-name="a1238">
                <text:p text:style-name="a1237" text:class-names="" text:cond-style-name=""><text:span text:style-name="a1236" text:class-names="">FYP Part</text:span></text:p>
              </table:table-cell>
              <table:table-cell table:style-name="a1241">
                <text:p text:style-name="a1240" text:class-names="" text:cond-style-name=""><text:span text:style-name="a1239" text:class-names="">Month 1</text:span></text:p>
              </table:table-cell>
              <table:table-cell table:style-name="a1244">
                <text:p text:style-name="a1243" text:class-names="" text:cond-style-name=""><text:span text:style-name="a1242" text:class-names="">Month 2</text:span></text:p>
              </table:table-cell>
              <table:table-cell table:style-name="a1247">
                <text:p text:style-name="a1246" text:class-names="" text:cond-style-name=""><text:span text:style-name="a1245" text:class-names="">Month 3</text:span></text:p>
              </table:table-cell>
              <table:table-cell table:style-name="a1250">
                <text:p text:style-name="a1249" text:class-names="" text:cond-style-name=""><text:span text:style-name="a1248" text:class-names="">Month 4</text:span></text:p>
              </table:table-cell>
              <table:table-cell table:style-name="a1253">
                <text:p text:style-name="a1252" text:class-names="" text:cond-style-name=""><text:span text:style-name="a1251" text:class-names="">Month 5</text:span></text:p>
              </table:table-cell>
              <table:table-cell table:style-name="a1256">
                <text:p text:style-name="a1255" text:class-names="" text:cond-style-name=""><text:span text:style-name="a1254" text:class-names="">Month 6</text:span></text:p>
              </table:table-cell>
              <table:table-cell table:style-name="a1259">
                <text:p text:style-name="a1258" text:class-names="" text:cond-style-name=""><text:span text:style-name="a1257" text:class-names="">Month 7</text:span></text:p>
              </table:table-cell>
              <table:table-cell table:style-name="a1262">
                <text:p text:style-name="a1261" text:class-names="" text:cond-style-name=""><text:span text:style-name="a1260" text:class-names="">Month 8</text:span></text:p>
              </table:table-cell>
            </table:table-row>
            <table:table-row table:style-name="a1263" table:default-cell-style-name="">
              <table:table-cell table:style-name="a1266">
                <text:p text:style-name="a1265" text:class-names="" text:cond-style-name=""><text:span text:style-name="a1264" text:class-names="">CV parsing engine</text:span></text:p>
              </table:table-cell>
              <table:table-cell table:style-name="a1269">
                <text:p text:style-name="a1268" text:class-names="" text:cond-style-name=""><text:span text:style-name="a1267" text:class-names="">FYP 1</text:span></text:p>
              </table:table-cell>
              <table:table-cell table:style-name="a1272">
                <text:p text:style-name="a1271" text:class-names="" text:cond-style-name=""><text:span text:style-name="a1270" text:class-names=""/></text:p>
              </table:table-cell>
              <table:table-cell table:style-name="a1275">
                <text:p text:style-name="a1274" text:class-names="" text:cond-style-name=""><text:span text:style-name="a1273" text:class-names=""/></text:p>
              </table:table-cell>
              <table:table-cell table:style-name="a1278">
                <text:p text:style-name="a1277" text:class-names="" text:cond-style-name=""><text:span text:style-name="a1276" text:class-names=""/></text:p>
              </table:table-cell>
              <table:table-cell table:style-name="a1281">
                <text:p text:style-name="a1280" text:class-names="" text:cond-style-name=""><text:span text:style-name="a1279" text:class-names=""/></text:p>
              </table:table-cell>
              <table:table-cell table:style-name="a1284">
                <text:p text:style-name="a1283" text:class-names="" text:cond-style-name=""><text:span text:style-name="a1282" text:class-names=""/></text:p>
              </table:table-cell>
              <table:table-cell table:style-name="a1287">
                <text:p text:style-name="a1286" text:class-names="" text:cond-style-name=""><text:span text:style-name="a1285" text:class-names=""/></text:p>
              </table:table-cell>
              <table:table-cell table:style-name="a1290">
                <text:p text:style-name="a1289" text:class-names="" text:cond-style-name=""><text:span text:style-name="a1288" text:class-names=""/></text:p>
              </table:table-cell>
              <table:table-cell table:style-name="a1293">
                <text:p text:style-name="a1292" text:class-names="" text:cond-style-name=""><text:span text:style-name="a1291" text:class-names=""/></text:p>
              </table:table-cell>
            </table:table-row>
            <table:table-row table:style-name="a1294" table:default-cell-style-name="">
              <table:table-cell table:style-name="a1297">
                <text:p text:style-name="a1296" text:class-names="" text:cond-style-name=""><text:span text:style-name="a1295" text:class-names="">AI knowledge-test module</text:span></text:p>
              </table:table-cell>
              <table:table-cell table:style-name="a1300">
                <text:p text:style-name="a1299" text:class-names="" text:cond-style-name=""><text:span text:style-name="a1298" text:class-names="">FYP 1</text:span></text:p>
              </table:table-cell>
              <table:table-cell table:style-name="a1303">
                <text:p text:style-name="a1302" text:class-names="" text:cond-style-name=""><text:span text:style-name="a1301" text:class-names=""/></text:p>
              </table:table-cell>
              <table:table-cell table:style-name="a1306">
                <text:p text:style-name="a1305" text:class-names="" text:cond-style-name=""><text:span text:style-name="a1304" text:class-names=""/></text:p>
              </table:table-cell>
              <table:table-cell table:style-name="a1309">
                <text:p text:style-name="a1308" text:class-names="" text:cond-style-name=""><text:span text:style-name="a1307" text:class-names=""/></text:p>
              </table:table-cell>
              <table:table-cell table:style-name="a1312">
                <text:p text:style-name="a1311" text:class-names="" text:cond-style-name=""><text:span text:style-name="a1310" text:class-names=""/></text:p>
              </table:table-cell>
              <table:table-cell table:style-name="a1315">
                <text:p text:style-name="a1314" text:class-names="" text:cond-style-name=""><text:span text:style-name="a1313" text:class-names=""/></text:p>
              </table:table-cell>
              <table:table-cell table:style-name="a1318">
                <text:p text:style-name="a1317" text:class-names="" text:cond-style-name=""><text:span text:style-name="a1316" text:class-names=""/></text:p>
              </table:table-cell>
              <table:table-cell table:style-name="a1321">
                <text:p text:style-name="a1320" text:class-names="" text:cond-style-name=""><text:span text:style-name="a1319" text:class-names=""/></text:p>
              </table:table-cell>
              <table:table-cell table:style-name="a1324">
                <text:p text:style-name="a1323" text:class-names="" text:cond-style-name=""><text:span text:style-name="a1322" text:class-names=""/></text:p>
              </table:table-cell>
            </table:table-row>
            <table:table-row table:style-name="a1325" table:default-cell-style-name="">
              <table:table-cell table:style-name="a1328">
                <text:p text:style-name="a1327" text:class-names="" text:cond-style-name=""><text:span text:style-name="a1326" text:class-names="">Interview module (video + analysis, confidence, face-mapping)</text:span></text:p>
              </table:table-cell>
              <table:table-cell table:style-name="a1331">
                <text:p text:style-name="a1330" text:class-names="" text:cond-style-name=""><text:span text:style-name="a1329" text:class-names="">FYP 2</text:span></text:p>
              </table:table-cell>
              <table:table-cell table:style-name="a1334">
                <text:p text:style-name="a1333" text:class-names="" text:cond-style-name=""><text:span text:style-name="a1332" text:class-names=""/></text:p>
              </table:table-cell>
              <table:table-cell table:style-name="a1337">
                <text:p text:style-name="a1336" text:class-names="" text:cond-style-name=""><text:span text:style-name="a1335" text:class-names=""/></text:p>
              </table:table-cell>
              <table:table-cell table:style-name="a1340">
                <text:p text:style-name="a1339" text:class-names="" text:cond-style-name=""><text:span text:style-name="a1338" text:class-names=""/></text:p>
              </table:table-cell>
              <table:table-cell table:style-name="a1343">
                <text:p text:style-name="a1342" text:class-names="" text:cond-style-name=""><text:span text:style-name="a1341" text:class-names=""/></text:p>
              </table:table-cell>
              <table:table-cell table:style-name="a1346">
                <text:p text:style-name="a1345" text:class-names="" text:cond-style-name=""><text:span text:style-name="a1344" text:class-names=""/></text:p>
              </table:table-cell>
              <table:table-cell table:style-name="a1349">
                <text:p text:style-name="a1348" text:class-names="" text:cond-style-name=""><text:span text:style-name="a1347" text:class-names=""/></text:p>
              </table:table-cell>
              <table:table-cell table:style-name="a1352">
                <text:p text:style-name="a1351" text:class-names="" text:cond-style-name=""><text:span text:style-name="a1350" text:class-names=""/></text:p>
              </table:table-cell>
              <table:table-cell table:style-name="a1355">
                <text:p text:style-name="a1354" text:class-names="" text:cond-style-name=""><text:span text:style-name="a1353" text:class-names=""/></text:p>
              </table:table-cell>
            </table:table-row>
            <table:table-row table:style-name="a1356" table:default-cell-style-name="">
              <table:table-cell table:style-name="a1359">
                <text:p text:style-name="a1358" text:class-names="" text:cond-style-name=""><text:span text:style-name="a1357" text:class-names="">Scoring &amp; candidate matching</text:span></text:p>
              </table:table-cell>
              <table:table-cell table:style-name="a1362">
                <text:p text:style-name="a1361" text:class-names="" text:cond-style-name=""><text:span text:style-name="a1360" text:class-names="">FYP 2</text:span></text:p>
              </table:table-cell>
              <table:table-cell table:style-name="a1365">
                <text:p text:style-name="a1364" text:class-names="" text:cond-style-name=""><text:span text:style-name="a1363" text:class-names=""/></text:p>
              </table:table-cell>
              <table:table-cell table:style-name="a1368">
                <text:p text:style-name="a1367" text:class-names="" text:cond-style-name=""><text:span text:style-name="a1366" text:class-names=""/></text:p>
              </table:table-cell>
              <table:table-cell table:style-name="a1371">
                <text:p text:style-name="a1370" text:class-names="" text:cond-style-name=""><text:span text:style-name="a1369" text:class-names=""/></text:p>
              </table:table-cell>
              <table:table-cell table:style-name="a1374">
                <text:p text:style-name="a1373" text:class-names="" text:cond-style-name=""><text:span text:style-name="a1372" text:class-names=""/></text:p>
              </table:table-cell>
              <table:table-cell table:style-name="a1377">
                <text:p text:style-name="a1376" text:class-names="" text:cond-style-name=""><text:span text:style-name="a1375" text:class-names=""/></text:p>
              </table:table-cell>
              <table:table-cell table:style-name="a1380">
                <text:p text:style-name="a1379" text:class-names="" text:cond-style-name=""><text:span text:style-name="a1378" text:class-names=""/></text:p>
              </table:table-cell>
              <table:table-cell table:style-name="a1383">
                <text:p text:style-name="a1382" text:class-names="" text:cond-style-name=""><text:span text:style-name="a1381" text:class-names=""/></text:p>
              </table:table-cell>
              <table:table-cell table:style-name="a1386">
                <text:p text:style-name="a1385" text:class-names="" text:cond-style-name=""><text:span text:style-name="a1384" text:class-names=""/></text:p>
              </table:table-cell>
            </table:table-row>
            <table:table-row table:style-name="a1387" table:default-cell-style-name="">
              <table:table-cell table:style-name="a1390">
                <text:p text:style-name="a1389" text:class-names="" text:cond-style-name=""><text:span text:style-name="a1388" text:class-names="">Email notification (selection / rejection)</text:span></text:p>
              </table:table-cell>
              <table:table-cell table:style-name="a1393">
                <text:p text:style-name="a1392" text:class-names="" text:cond-style-name=""><text:span text:style-name="a1391" text:class-names=""/></text:p>
              </table:table-cell>
              <table:table-cell table:style-name="a1396">
                <text:p text:style-name="a1395" text:class-names="" text:cond-style-name=""><text:span text:style-name="a1394" text:class-names=""/></text:p>
              </table:table-cell>
              <table:table-cell table:style-name="a1399">
                <text:p text:style-name="a1398" text:class-names="" text:cond-style-name=""><text:span text:style-name="a1397" text:class-names=""/></text:p>
              </table:table-cell>
              <table:table-cell table:style-name="a1402">
                <text:p text:style-name="a1401" text:class-names="" text:cond-style-name=""><text:span text:style-name="a1400" text:class-names=""/></text:p>
              </table:table-cell>
              <table:table-cell table:style-name="a1405">
                <text:p text:style-name="a1404" text:class-names="" text:cond-style-name=""><text:span text:style-name="a1403" text:class-names=""/></text:p>
              </table:table-cell>
              <table:table-cell table:style-name="a1408">
                <text:p text:style-name="a1407" text:class-names="" text:cond-style-name=""><text:span text:style-name="a1406" text:class-names=""/></text:p>
              </table:table-cell>
              <table:table-cell table:style-name="a1411">
                <text:p text:style-name="a1410" text:class-names="" text:cond-style-name=""><text:span text:style-name="a1409" text:class-names=""/></text:p>
              </table:table-cell>
              <table:table-cell table:style-name="a1414">
                <text:p text:style-name="a1413" text:class-names="" text:cond-style-name=""><text:span text:style-name="a1412" text:class-names=""/></text:p>
              </table:table-cell>
              <table:table-cell table:style-name="a1417">
                <text:p text:style-name="a1416" text:class-names="" text:cond-style-name=""><text:span text:style-name="a1415" text:class-names=""/></text:p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Integration &amp; usability testing</text:span></text:p>
              </table:table-cell>
              <table:table-cell table:style-name="a1424">
                <text:p text:style-name="a1423" text:class-names="" text:cond-style-name=""><text:span text:style-name="a1422" text:class-names="">FYP 2</text:span></text:p>
              </table:table-cell>
              <table:table-cell table:style-name="a1427">
                <text:p text:style-name="a1426" text:class-names="" text:cond-style-name=""><text:span text:style-name="a1425" text:class-names=""/></text:p>
              </table:table-cell>
              <table:table-cell table:style-name="a1430">
                <text:p text:style-name="a1429" text:class-names="" text:cond-style-name=""><text:span text:style-name="a1428" text:class-names=""/></text:p>
              </table:table-cell>
              <table:table-cell table:style-name="a1433">
                <text:p text:style-name="a1432" text:class-names="" text:cond-style-name=""><text:span text:style-name="a1431" text:class-names=""/></text:p>
              </table:table-cell>
              <table:table-cell table:style-name="a1436">
                <text:p text:style-name="a1435" text:class-names="" text:cond-style-name=""><text:span text:style-name="a1434" text:class-names=""/></text:p>
              </table:table-cell>
              <table:table-cell table:style-name="a1439">
                <text:p text:style-name="a1438" text:class-names="" text:cond-style-name=""><text:span text:style-name="a1437" text:class-names=""/></text:p>
              </table:table-cell>
              <table:table-cell table:style-name="a1442">
                <text:p text:style-name="a1441" text:class-names="" text:cond-style-name=""><text:span text:style-name="a1440" text:class-names=""/></text:p>
              </table:table-cell>
              <table:table-cell table:style-name="a1445">
                <text:p text:style-name="a1444" text:class-names="" text:cond-style-name=""><text:span text:style-name="a1443" text:class-names=""/></text:p>
              </table:table-cell>
              <table:table-cell table:style-name="a1448">
                <text:p text:style-name="a1447" text:class-names="" text:cond-style-name=""><text:span text:style-name="a1446" text:class-names=""/></text:p>
              </table:table-cell>
            </table:table-row>
            <table:table-row table:style-name="a1449" table:default-cell-style-name="">
              <table:table-cell table:style-name="a1456">
                <text:p text:style-name="a1451" text:class-names="" text:cond-style-name=""><text:span text:style-name="a1450" text:class-names=""/></text:p>
                <text:p text:style-name="a1453" text:class-names="" text:cond-style-name=""><text:span text:style-name="a1452" text:class-names="">Final deployment</text:span></text:p>
                <text:p text:style-name="a1455" text:class-names="" text:cond-style-name=""><text:span text:style-name="a1454" text:class-names=""/></text:p>
              </table:table-cell>
              <table:table-cell table:style-name="a1459">
                <text:p text:style-name="a1458" text:class-names="" text:cond-style-name=""><text:span text:style-name="a1457" text:class-names="">FYP 2</text:span></text:p>
              </table:table-cell>
              <table:table-cell table:style-name="a1462">
                <text:p text:style-name="a1461" text:class-names="" text:cond-style-name=""><text:span text:style-name="a1460" text:class-names=""/></text:p>
              </table:table-cell>
              <table:table-cell table:style-name="a1465">
                <text:p text:style-name="a1464" text:class-names="" text:cond-style-name=""><text:span text:style-name="a1463" text:class-names=""/></text:p>
              </table:table-cell>
              <table:table-cell table:style-name="a1468">
                <text:p text:style-name="a1467" text:class-names="" text:cond-style-name=""><text:span text:style-name="a1466" text:class-names=""/></text:p>
              </table:table-cell>
              <table:table-cell table:style-name="a1471">
                <text:p text:style-name="a1470" text:class-names="" text:cond-style-name=""><text:span text:style-name="a1469" text:class-names=""/></text:p>
              </table:table-cell>
              <table:table-cell table:style-name="a1474">
                <text:p text:style-name="a1473" text:class-names="" text:cond-style-name=""><text:span text:style-name="a1472" text:class-names=""/></text:p>
              </table:table-cell>
              <table:table-cell table:style-name="a1477">
                <text:p text:style-name="a1476" text:class-names="" text:cond-style-name=""><text:span text:style-name="a1475" text:class-names=""/></text:p>
              </table:table-cell>
              <table:table-cell table:style-name="a1480">
                <text:p text:style-name="a1479" text:class-names="" text:cond-style-name=""><text:span text:style-name="a1478" text:class-names=""/></text:p>
              </table:table-cell>
              <table:table-cell table:style-name="a1483">
                <text:p text:style-name="a1482" text:class-names="" text:cond-style-name=""><text:span text:style-name="a1481" text:class-names=""/></text:p>
              </table:table-cell>
            </table:table-row>
            <table:table-row table:style-name="a1484" table:default-cell-style-name="">
              <table:table-cell table:style-name="a1487">
                <text:p text:style-name="a1486" text:class-names="" text:cond-style-name=""><text:span text:style-name="a1485" text:class-names="">Documentation</text:span></text:p>
              </table:table-cell>
              <table:table-cell table:style-name="a1490">
                <text:p text:style-name="a1489" text:class-names="" text:cond-style-name=""><text:span text:style-name="a1488" text:class-names="">FYP 1/2</text:span></text:p>
              </table:table-cell>
              <table:table-cell table:style-name="a1493">
                <text:p text:style-name="a1492" text:class-names="" text:cond-style-name=""><text:span text:style-name="a1491" text:class-names=""/></text:p>
              </table:table-cell>
              <table:table-cell table:style-name="a1496">
                <text:p text:style-name="a1495" text:class-names="" text:cond-style-name=""><text:span text:style-name="a1494" text:class-names=""/></text:p>
              </table:table-cell>
              <table:table-cell table:style-name="a1499">
                <text:p text:style-name="a1498" text:class-names="" text:cond-style-name=""><text:span text:style-name="a1497" text:class-names=""/></text:p>
              </table:table-cell>
              <table:table-cell table:style-name="a1502">
                <text:p text:style-name="a1501" text:class-names="" text:cond-style-name=""><text:span text:style-name="a1500" text:class-names=""/></text:p>
              </table:table-cell>
              <table:table-cell table:style-name="a1505">
                <text:p text:style-name="a1504" text:class-names="" text:cond-style-name=""><text:span text:style-name="a1503" text:class-names=""/></text:p>
              </table:table-cell>
              <table:table-cell table:style-name="a1508">
                <text:p text:style-name="a1507" text:class-names="" text:cond-style-name=""><text:span text:style-name="a1506" text:class-names=""/></text:p>
              </table:table-cell>
              <table:table-cell table:style-name="a1511">
                <text:p text:style-name="a1510" text:class-names="" text:cond-style-name=""><text:span text:style-name="a1509" text:class-names=""/></text:p>
              </table:table-cell>
              <table:table-cell table:style-name="a1514">
                <text:p text:style-name="a1513" text:class-names="" text:cond-style-name=""><text:span text:style-name="a1512" text:class-names=""/></text:p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158" presentation:style-name="a1517" draw:name="Google Shape;160;p22" svg:x="0.19444in" svg:y="-0.20362in" svg:width="10.6in" svg:height="1.44965in" presentation:class="title" presentation:placeholder="false">
          <draw:text-box>
            <text:p text:style-name="a1516" text:class-names="" text:cond-style-name=""><text:span text:style-name="a1515" text:class-names="">Objectives</text:span></text:p>
          </draw:text-box>
          <svg:title/>
          <svg:desc/>
        </draw:frame>
        <presentation:notes draw:style-name="a1520">
          <draw:frame draw:id="id159" presentation:style-name="a1518" draw:name="Google Shape;157;p8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20" svg:x="0.75in" svg:y="1.25in" svg:width="6in" svg:height="3.375in" presentation:class="page" draw:id="id160" presentation:style-name="a1519" draw:name="Google Shape;158;p8:notes">
            <svg:title/>
            <svg:desc/>
          </draw:page-thumbnail>
        </presentation:notes>
      </draw:page>
      <draw:page draw:name="Slide10" draw:style-name="a1521" draw:master-page-name="Master2-Layout1-obj-OBJECT" presentation:presentation-page-layout-name="Master2-PPL1" draw:id="Slide-265">
        <draw:frame draw:id="id161" draw:style-name="a1522" draw:name="Picture 8" svg:x="11.08438in" svg:y="4.96875in" svg:width="2.53125in" svg:height="2.53125in" style:rel-width="scale" style:rel-height="scale">
          <draw:image xlink:href="media/image22.jpeg" xlink:type="simple" xlink:show="embed" xlink:actuate="onLoad"/>
          <svg:title/>
          <svg:desc>A group of people climbing stairs

AI-generated content may be incorrect.</svg:desc>
        </draw:frame>
        <draw:frame draw:id="id162" presentation:style-name="a1525" draw:name="Google Shape;174;p24" svg:x="0.18196in" svg:y="-0.63628in" svg:width="10.6in" svg:height="1.44965in" presentation:class="title" presentation:placeholder="false">
          <draw:text-box>
            <text:p text:style-name="a1524" text:class-names="" text:cond-style-name=""><text:span text:style-name="a1523" text:class-names="">Team Work</text:span></text:p>
          </draw:text-box>
          <svg:title/>
          <svg:desc/>
        </draw:frame>
        <draw:frame draw:id="id163" draw:style-name="a1528" draw:name="Google Shape;176;p24" svg:x="12.35in" svg:y="6.75001in" svg:width="1in" svg:height="0.64931in">
          <draw:text-box>
            <text:p text:style-name="a1527" text:class-names="" text:cond-style-name=""><text:span text:style-name="a1526" text:class-names=""><text:page-number style:num-format="1" text:fixed="false"/></text:span></text:p>
          </draw:text-box>
          <svg:title/>
          <svg:desc/>
        </draw:frame>
        <draw:custom-shape svg:x="11.66667in" svg:y="0in" svg:width="1.79167in" svg:height="5.09722in" draw:id="id164" draw:style-name="a1531" draw:name="Rectangle 12">
          <svg:title/>
          <svg:desc/>
          <text:p text:style-name="a1530" text:class-names="" text:cond-style-name=""><text:span text:style-name="a1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name="Table 2" svg:x="0.18196in" svg:y="0.97743in" svg:width="11.02637in" svg:height="6.43404in">
          <table:table table:style-name="a1532" table:template-name="{616DA210-FB5B-4158-B5E0-FEB733F419B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33" table:default-cell-style-name=""/>
            <table:table-column table:style-name="a1534" table:default-cell-style-name=""/>
            <table:table-column table:style-name="a1535" table:default-cell-style-name=""/>
            <table:table-column table:style-name="a1536" table:default-cell-style-name=""/>
            <table:table-row table:style-name="a1537" table:default-cell-style-name="">
              <table:table-cell table:style-name="a1540">
                <text:p text:style-name="a1539" text:class-names="" text:cond-style-name=""><text:span text:style-name="a1538" text:class-names="">Project Phase</text:span></text:p>
              </table:table-cell>
              <table:table-cell table:style-name="a1543">
                <text:p text:style-name="a1542" text:class-names="" text:cond-style-name=""><text:span text:style-name="a1541" text:class-names="">Task / Activity</text:span></text:p>
              </table:table-cell>
              <table:table-cell table:style-name="a1546">
                <text:p text:style-name="a1545" text:class-names="" text:cond-style-name=""><text:span text:style-name="a1544" text:class-names="">Lead</text:span></text:p>
              </table:table-cell>
              <table:table-cell table:style-name="a1549">
                <text:p text:style-name="a1548" text:class-names="" text:cond-style-name=""><text:span text:style-name="a1547" text:class-names="">Support</text:span></text:p>
              </table:table-cell>
            </table:table-row>
            <table:table-row table:style-name="a1550" table:default-cell-style-name="">
              <table:table-cell table:style-name="a1554">
                <text:p text:style-name="a1553" text:class-names="" text:cond-style-name=""><text:span text:style-name="a1551" text:class-names="">Requirements Gathering</text:span><text:span text:style-name="a1552" text:class-names=""/></text:p>
              </table:table-cell>
              <table:table-cell table:style-name="a1557">
                <text:p text:style-name="a1556" text:class-names="" text:cond-style-name=""><text:span text:style-name="a1555" text:class-names="">Collect requirements, define MVP &amp; user personas, prepare diagrams (Use-case, Flow)</text:span></text:p>
              </table:table-cell>
              <table:table-cell table:style-name="a1560">
                <text:p text:style-name="a1559" text:class-names="" text:cond-style-name=""><text:span text:style-name="a1558" text:class-names="">Dilawar</text:span></text:p>
              </table:table-cell>
              <table:table-cell table:style-name="a1563">
                <text:p text:style-name="a1562" text:class-names="" text:cond-style-name=""><text:span text:style-name="a1561" text:class-names="">Ashar, Abdullah</text:span></text:p>
              </table:table-cell>
            </table:table-row>
            <table:table-row table:style-name="a1564" table:default-cell-style-name="">
              <table:table-cell table:style-name="a1568">
                <text:p text:style-name="a1567" text:class-names="" text:cond-style-name=""><text:span text:style-name="a1565" text:class-names="">Wireframing &amp; Design</text:span><text:span text:style-name="a1566" text:class-names=""/></text:p>
              </table:table-cell>
              <table:table-cell table:style-name="a1579">
                <text:p text:style-name="a1570" text:class-names="" text:cond-style-name=""><text:span text:style-name="a1569" text:class-names="">Wireframing (Low-Fidelity),</text:span></text:p>
                <text:p text:style-name="a1572" text:class-names="" text:cond-style-name=""><text:span text:style-name="a1571" text:class-names="">High-Fidelity UI Design,</text:span></text:p>
                <text:p text:style-name="a1574" text:class-names="" text:cond-style-name=""><text:span text:style-name="a1573" text:class-names="">Component Breakdown</text:span></text:p>
                <text:p text:style-name="a1576" text:class-names="" text:cond-style-name=""><text:span text:style-name="a1575" text:class-names="">Discussion</text:span></text:p>
                <text:p text:style-name="a1578" text:class-names="" text:cond-style-name=""><text:span text:style-name="a1577" text:class-names=""/></text:p>
              </table:table-cell>
              <table:table-cell table:style-name="a1582">
                <text:p text:style-name="a1581" text:class-names="" text:cond-style-name=""><text:span text:style-name="a1580" text:class-names=""/></text:p>
              </table:table-cell>
              <table:table-cell table:style-name="a1585">
                <text:p text:style-name="a1584" text:class-names="" text:cond-style-name=""><text:span text:style-name="a1583" text:class-names="">All Members</text:span></text:p>
              </table:table-cell>
            </table:table-row>
            <table:table-row table:style-name="a1586" table:default-cell-style-name="">
              <table:table-cell table:style-name="a1590">
                <text:p text:style-name="a1589" text:class-names="" text:cond-style-name=""><text:span text:style-name="a1587" text:class-names="">Frontend Development (Phase 1)</text:span><text:span text:style-name="a1588" text:class-names=""/></text:p>
              </table:table-cell>
              <table:table-cell table:style-name="a1595">
                <text:p text:style-name="a1592" text:class-names="" text:cond-style-name=""><text:span text:style-name="a1591" text:class-names="">Build UI Components ( e.g.</text:span></text:p>
                <text:p text:style-name="a1594" text:class-names="" text:cond-style-name=""><text:span text:style-name="a1593" text:class-names="">Candidate portal, HR dashboard )</text:span></text:p>
              </table:table-cell>
              <table:table-cell table:style-name="a1598">
                <text:p text:style-name="a1597" text:class-names="" text:cond-style-name=""><text:span text:style-name="a1596" text:class-names="">Ashar</text:span></text:p>
              </table:table-cell>
              <table:table-cell table:style-name="a1601">
                <text:p text:style-name="a1600" text:class-names="" text:cond-style-name=""><text:span text:style-name="a1599" text:class-names="">Dilawar, Abdullah</text:span></text:p>
              </table:table-cell>
            </table:table-row>
            <table:table-row table:style-name="a1602" table:default-cell-style-name="">
              <table:table-cell table:style-name="a1606">
                <text:p text:style-name="a1605" text:class-names="" text:cond-style-name=""><text:span text:style-name="a1603" text:class-names="">Backend Development</text:span><text:span text:style-name="a1604" text:class-names=""/></text:p>
              </table:table-cell>
              <table:table-cell table:style-name="a1609">
                <text:p text:style-name="a1608" text:class-names="" text:cond-style-name=""><text:span text:style-name="a1607" text:class-names="">Backend implementation &amp; APIs</text:span></text:p>
              </table:table-cell>
              <table:table-cell table:style-name="a1612">
                <text:p text:style-name="a1611" text:class-names="" text:cond-style-name=""><text:span text:style-name="a1610" text:class-names="">Ashar</text:span></text:p>
              </table:table-cell>
              <table:table-cell table:style-name="a1616">
                <text:p text:style-name="a1615" text:class-names="" text:cond-style-name=""><text:span text:style-name="a1613" text:class-names="">Ashar,<text:s text:c="1"/></text:span><text:span text:style-name="a1614" text:class-names="">Dilawar</text:span></text:p>
              </table:table-cell>
            </table:table-row>
            <table:table-row table:style-name="a1617" table:default-cell-style-name="">
              <table:table-cell table:style-name="a1621">
                <text:p text:style-name="a1620" text:class-names="" text:cond-style-name=""><text:span text:style-name="a1618" text:class-names="">Database</text:span><text:span text:style-name="a1619" text:class-names=""/></text:p>
              </table:table-cell>
              <table:table-cell table:style-name="a1624">
                <text:p text:style-name="a1623" text:class-names="" text:cond-style-name=""><text:span text:style-name="a1622" text:class-names="">Schema design &amp; queries</text:span></text:p>
              </table:table-cell>
              <table:table-cell table:style-name="a1627">
                <text:p text:style-name="a1626" text:class-names="" text:cond-style-name=""><text:span text:style-name="a1625" text:class-names="">Dilawar</text:span></text:p>
              </table:table-cell>
              <table:table-cell table:style-name="a1630">
                <text:p text:style-name="a1629" text:class-names="" text:cond-style-name=""><text:span text:style-name="a1628" text:class-names="">Ashar, Abdullah</text:span></text:p>
              </table:table-cell>
            </table:table-row>
            <table:table-row table:style-name="a1631" table:default-cell-style-name="">
              <table:table-cell table:style-name="a1635">
                <text:p text:style-name="a1634" text:class-names="" text:cond-style-name=""><text:span text:style-name="a1632" text:class-names="">CV Parsing Module</text:span><text:span text:style-name="a1633" text:class-names=""/></text:p>
              </table:table-cell>
              <table:table-cell table:style-name="a1638">
                <text:p text:style-name="a1637" text:class-names="" text:cond-style-name=""><text:span text:style-name="a1636" text:class-names="">Resume upload, extract key details</text:span></text:p>
              </table:table-cell>
              <table:table-cell table:style-name="a1641">
                <text:p text:style-name="a1640" text:class-names="" text:cond-style-name=""><text:span text:style-name="a1639" text:class-names="">Abdullah</text:span></text:p>
              </table:table-cell>
              <table:table-cell table:style-name="a1644">
                <text:p text:style-name="a1643" text:class-names="" text:cond-style-name=""><text:span text:style-name="a1642" text:class-names="">Dilawar, Abdullah</text:span></text:p>
              </table:table-cell>
            </table:table-row>
            <table:table-row table:style-name="a1645" table:default-cell-style-name="">
              <table:table-cell table:style-name="a1649">
                <text:p text:style-name="a1648" text:class-names="" text:cond-style-name=""><text:span text:style-name="a1646" text:class-names="">Test Conducting Module</text:span><text:span text:style-name="a1647" text:class-names=""/></text:p>
              </table:table-cell>
              <table:table-cell table:style-name="a1653">
                <text:p text:style-name="a1652" text:class-names="" text:cond-style-name=""><text:span text:style-name="a1650" text:class-names="">AI test engine, randomized questions, cheating prevention</text:span><text:span text:style-name="a1651" text:class-names=""/></text:p>
              </table:table-cell>
              <table:table-cell table:style-name="a1656">
                <text:p text:style-name="a1655" text:class-names="" text:cond-style-name=""><text:span text:style-name="a1654" text:class-names="">Dilawar<text:s text:c="1"/></text:span></text:p>
              </table:table-cell>
              <table:table-cell table:style-name="a1659">
                <text:p text:style-name="a1658" text:class-names="" text:cond-style-name=""><text:span text:style-name="a1657" text:class-names="">Ashar, Abdullah</text:span></text:p>
              </table:table-cell>
            </table:table-row>
            <table:table-row table:style-name="a1660" table:default-cell-style-name="">
              <table:table-cell table:style-name="a1664">
                <text:p text:style-name="a1663" text:class-names="" text:cond-style-name=""><text:span text:style-name="a1661" text:class-names="">Frontend Development (Phase 2)</text:span><text:span text:style-name="a1662" text:class-names=""/></text:p>
              </table:table-cell>
              <table:table-cell table:style-name="a1667">
                <text:p text:style-name="a1666" text:class-names="" text:cond-style-name=""><text:span text:style-name="a1665" text:class-names="">Continue frontend, CRUD, UI review &amp; styling</text:span></text:p>
              </table:table-cell>
              <table:table-cell table:style-name="a1670">
                <text:p text:style-name="a1669" text:class-names="" text:cond-style-name=""><text:span text:style-name="a1668" text:class-names=""/></text:p>
              </table:table-cell>
              <table:table-cell table:style-name="a1673">
                <text:p text:style-name="a1672" text:class-names="" text:cond-style-name=""><text:span text:style-name="a1671" text:class-names="">All Members</text:span></text:p>
              </table:table-cell>
            </table:table-row>
            <table:table-row table:style-name="a1674" table:default-cell-style-name="">
              <table:table-cell table:style-name="a1678">
                <text:p text:style-name="a1677" text:class-names="" text:cond-style-name=""><text:span text:style-name="a1675" text:class-names="">Interview Module</text:span><text:span text:style-name="a1676" text:class-names=""/></text:p>
              </table:table-cell>
              <table:table-cell table:style-name="a1682">
                <text:p text:style-name="a1681" text:class-names="" text:cond-style-name=""><text:span text:style-name="a1679" text:class-names="">AI video interviews, ID verification, soft skills analysis</text:span><text:span text:style-name="a1680" text:class-names=""/></text:p>
              </table:table-cell>
              <table:table-cell table:style-name="a1686">
                <text:p text:style-name="a1685" text:class-names="" text:cond-style-name=""><text:span text:style-name="a1683" text:class-names="">Abdullah</text:span><text:span text:style-name="a1684" text:class-names=""/></text:p>
              </table:table-cell>
              <table:table-cell table:style-name="a1690">
                <text:p text:style-name="a1689" text:class-names="" text:cond-style-name=""><text:span text:style-name="a1687" text:class-names="">Ashar,<text:s text:c="1"/></text:span><text:span text:style-name="a1688" text:class-names="">Dilawar</text:span></text:p>
              </table:table-cell>
            </table:table-row>
            <table:table-row table:style-name="a1691" table:default-cell-style-name="">
              <table:table-cell table:style-name="a1694">
                <text:p text:style-name="a1693" text:class-names="" text:cond-style-name=""><text:span text:style-name="a1692" text:class-names="">Integration &amp; Matching</text:span></text:p>
              </table:table-cell>
              <table:table-cell table:style-name="a1697">
                <text:p text:style-name="a1696" text:class-names="" text:cond-style-name=""><text:span text:style-name="a1695" text:class-names="">integration, ranking algorithm, optimization</text:span></text:p>
              </table:table-cell>
              <table:table-cell table:style-name="a1700">
                <text:p text:style-name="a1699" text:class-names="" text:cond-style-name=""><text:span text:style-name="a1698" text:class-names="">Ashar</text:span></text:p>
              </table:table-cell>
              <table:table-cell table:style-name="a1703">
                <text:p text:style-name="a1702" text:class-names="" text:cond-style-name=""><text:span text:style-name="a1701" text:class-names="">Abdullah, Dilawar</text:span></text:p>
              </table:table-cell>
            </table:table-row>
            <table:table-row table:style-name="a1704" table:default-cell-style-name="">
              <table:table-cell table:style-name="a1708">
                <text:p text:style-name="a1707" text:class-names="" text:cond-style-name=""><text:span text:style-name="a1705" text:class-names="">Unit Testing</text:span><text:span text:style-name="a1706" text:class-names=""/></text:p>
              </table:table-cell>
              <table:table-cell table:style-name="a1712">
                <text:p text:style-name="a1711" text:class-names="" text:cond-style-name=""><text:span text:style-name="a1709" text:class-names="">Test individual components</text:span><text:span text:style-name="a1710" text:class-names=""/></text:p>
              </table:table-cell>
              <table:table-cell table:style-name="a1715">
                <text:p text:style-name="a1714" text:class-names="" text:cond-style-name=""><text:span text:style-name="a1713" text:class-names=""/></text:p>
              </table:table-cell>
              <table:table-cell table:style-name="a1718">
                <text:p text:style-name="a1717" text:class-names="" text:cond-style-name=""><text:span text:style-name="a1716" text:class-names="">All Members</text:span></text:p>
              </table:table-cell>
            </table:table-row>
            <table:table-row table:style-name="a1719" table:default-cell-style-name="">
              <table:table-cell table:style-name="a1723">
                <text:p text:style-name="a1722" text:class-names="" text:cond-style-name=""><text:span text:style-name="a1720" text:class-names="">Deployment &amp; Hosting</text:span><text:span text:style-name="a1721" text:class-names=""/></text:p>
              </table:table-cell>
              <table:table-cell table:style-name="a1726">
                <text:p text:style-name="a1725" text:class-names="" text:cond-style-name=""><text:span text:style-name="a1724" text:class-names="">hosting</text:span></text:p>
              </table:table-cell>
              <table:table-cell table:style-name="a1729">
                <text:p text:style-name="a1728" text:class-names="" text:cond-style-name=""><text:span text:style-name="a1727" text:class-names="">Abdullah</text:span></text:p>
              </table:table-cell>
              <table:table-cell table:style-name="a1732">
                <text:p text:style-name="a1731" text:class-names="" text:cond-style-name=""><text:span text:style-name="a1730" text:class-names="">Ashar, Dilawar</text:span></text:p>
              </table:table-cell>
            </table:table-row>
            <table:table-row table:style-name="a1733" table:default-cell-style-name="">
              <table:table-cell table:style-name="a1736">
                <text:p text:style-name="a1735" text:class-names="" text:cond-style-name=""><text:span text:style-name="a1734" text:class-names="">Documentation</text:span></text:p>
              </table:table-cell>
              <table:table-cell table:style-name="a1739">
                <text:p text:style-name="a1738" text:class-names="" text:cond-style-name=""><text:span text:style-name="a1737" text:class-names="">final documentation</text:span></text:p>
              </table:table-cell>
              <table:table-cell table:style-name="a1742">
                <text:p text:style-name="a1741" text:class-names="" text:cond-style-name=""><text:span text:style-name="a1740" text:class-names=""/></text:p>
              </table:table-cell>
              <table:table-cell table:style-name="a1745">
                <text:p text:style-name="a1744" text:class-names="" text:cond-style-name=""><text:span text:style-name="a1743" text:class-names="">All Members</text:span></text:p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presentation:notes draw:style-name="a1748">
          <draw:frame draw:id="id166" presentation:style-name="a1746" draw:name="Google Shape;171;p10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21" svg:x="0.75in" svg:y="1.25in" svg:width="6in" svg:height="3.375in" presentation:class="page" draw:id="id167" presentation:style-name="a1747" draw:name="Google Shape;172;p10:notes">
            <svg:title/>
            <svg:desc/>
          </draw:page-thumbnail>
        </presentation:notes>
      </draw:page>
      <draw:page draw:name="Slide28" draw:style-name="a1749" draw:master-page-name="Master2-Layout2-twoObj-TWO_OBJECTS" presentation:presentation-page-layout-name="Master2-PPL2" draw:id="Slide-283">
        <draw:frame draw:id="id168" draw:name="Table 6" svg:x="0.64024in" svg:y="2.01265in" svg:width="11.39322in" svg:height="5.09106in">
          <table:table table:style-name="a1750" table:template-name="{073A0DAA-6AF3-43AB-8588-CEC1D06C72B9}" table:use-banding-columns-styles="false" table:use-banding-rows-styles="true" table:use-first-column-styles="false" table:use-first-row-styles="false" table:use-last-column-styles="false" table:use-last-row-styles="false">
            <table:table-column table:style-name="a1751" table:default-cell-style-name=""/>
            <table:table-column table:style-name="a1752" table:default-cell-style-name=""/>
            <table:table-column table:style-name="a1753" table:default-cell-style-name=""/>
            <table:table-row table:style-name="a1754" table:default-cell-style-name="">
              <table:table-cell table:style-name="a1757">
                <text:p text:style-name="a1756" text:class-names="" text:cond-style-name=""><text:span text:style-name="a1755" text:class-names="">Main Task / Goals</text:span></text:p>
              </table:table-cell>
              <table:table-cell table:style-name="a1760">
                <text:p text:style-name="a1759" text:class-names="" text:cond-style-name=""><text:span text:style-name="a1758" text:class-names="">Detailed Work Completed</text:span></text:p>
              </table:table-cell>
              <table:table-cell table:style-name="a1763">
                <text:p text:style-name="a1762" text:class-names="" text:cond-style-name=""><text:span text:style-name="a1761" text:class-names="">Status</text:span></text:p>
              </table:table-cell>
            </table:table-row>
            <table:table-row table:style-name="a1764" table:default-cell-style-name="">
              <table:table-cell table:style-name="a1767">
                <text:p text:style-name="a1766" text:class-names="" text:cond-style-name=""><text:span text:style-name="a1765" text:class-names="">Candidate Portal (Registration &amp; CV Upload)</text:span></text:p>
              </table:table-cell>
              <table:table-cell table:style-name="a1770">
                <text:p text:style-name="a1769" text:class-names="" text:cond-style-name=""><text:span text:style-name="a1768" text:class-names="">Implemented user registration, login, and CV upload functionality. Form validation and basic UI completed.</text:span></text:p>
              </table:table-cell>
              <table:table-cell table:style-name="a1774">
                <text:p text:style-name="a1773" text:class-names="" text:cond-style-name=""><text:span text:style-name="a1771" text:class-names="">Partially Completed<text:s text:c="1"/></text:span><text:span text:style-name="a1772" text:class-names=""/></text:p>
              </table:table-cell>
            </table:table-row>
            <table:table-row table:style-name="a1775" table:default-cell-style-name="">
              <table:table-cell table:style-name="a1778">
                <text:p text:style-name="a1777" text:class-names="" text:cond-style-name=""><text:span text:style-name="a1776" text:class-names="">HR Dashboard (Basic Job Panel)</text:span></text:p>
              </table:table-cell>
              <table:table-cell table:style-name="a1781">
                <text:p text:style-name="a1780" text:class-names="" text:cond-style-name=""><text:span text:style-name="a1779" text:class-names="">Designed dashboard layout, added job listing panel, and basic CRUD operations for job posts.</text:span></text:p>
              </table:table-cell>
              <table:table-cell table:style-name="a1786">
                <text:p text:style-name="a1783" text:class-names="" text:cond-style-name=""><text:span text:style-name="a1782" text:class-names="">Partially Completed<text:s text:c="1"/></text:span></text:p>
                <text:p text:style-name="a1785" text:class-names="" text:cond-style-name=""><text:span text:style-name="a1784" text:class-names=""/></text:p>
              </table:table-cell>
            </table:table-row>
            <table:table-row table:style-name="a1787" table:default-cell-style-name="">
              <table:table-cell table:style-name="a1790">
                <text:p text:style-name="a1789" text:class-names="" text:cond-style-name=""><text:span text:style-name="a1788" text:class-names="">CV Parsing Engine</text:span></text:p>
              </table:table-cell>
              <table:table-cell table:style-name="a1793">
                <text:p text:style-name="a1792" text:class-names="" text:cond-style-name=""><text:span text:style-name="a1791" text:class-names="">Developed parser to extract key candidate information (name, contact, education, skills) from uploaded CVs.</text:span></text:p>
              </table:table-cell>
              <table:table-cell table:style-name="a1798">
                <text:p text:style-name="a1795" text:class-names="" text:cond-style-name=""><text:span text:style-name="a1794" text:class-names="">Completed<text:s text:c="1"/></text:span></text:p>
                <text:p text:style-name="a1797" text:class-names="" text:cond-style-name=""><text:span text:style-name="a1796" text:class-names=""/></text:p>
              </table:table-cell>
            </table:table-row>
            <table:table-row table:style-name="a1799" table:default-cell-style-name="">
              <table:table-cell table:style-name="a1802">
                <text:p text:style-name="a1801" text:class-names="" text:cond-style-name=""><text:span text:style-name="a1800" text:class-names="">AI Knowledge-Test Module</text:span></text:p>
              </table:table-cell>
              <table:table-cell table:style-name="a1805">
                <text:p text:style-name="a1804" text:class-names="" text:cond-style-name=""><text:span text:style-name="a1803" text:class-names="">Built AI-powered test module, including question bank and automatic scoring.</text:span></text:p>
              </table:table-cell>
              <table:table-cell table:style-name="a1810">
                <text:p text:style-name="a1807" text:class-names="" text:cond-style-name=""><text:span text:style-name="a1806" text:class-names="">Completed<text:s text:c="1"/></text:span></text:p>
                <text:p text:style-name="a1809" text:class-names="" text:cond-style-name=""><text:span text:style-name="a1808" text:class-names=""/></text:p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169" presentation:style-name="a1814" draw:name="Google Shape;174;p24" svg:x="0.63928in" svg:y="0.00396in" svg:width="10.6in" svg:height="1.44965in" presentation:class="title" presentation:placeholder="false">
          <draw:text-box>
            <text:p text:style-name="a1813" text:class-names="" text:cond-style-name=""><text:span text:style-name="a1811" text:class-names="">Goal Achieved</text:span><text:span text:style-name="a1812" text:class-names=""/></text:p>
          </draw:text-box>
          <svg:title/>
          <svg:desc/>
        </draw:frame>
      </draw:page>
      <draw:page draw:name="Slide13" draw:style-name="a1815" draw:master-page-name="Master2-Layout1-obj-OBJECT" presentation:presentation-page-layout-name="Master2-PPL1" draw:id="Slide-268">
        <draw:frame draw:id="id170" presentation:style-name="a1818" draw:name="Google Shape;167;p23" svg:x="3.48417in" svg:y="1.15in" svg:width="10.6in" svg:height="1.44965in" presentation:class="title" presentation:placeholder="false">
          <draw:text-box>
            <text:p text:style-name="a1817" text:class-names="" text:cond-style-name=""><text:span text:style-name="a1816" text:class-names="">User Interface</text:span></text:p>
          </draw:text-box>
          <svg:title/>
          <svg:desc/>
        </draw:frame>
        <draw:frame draw:id="id171" draw:style-name="a1819" draw:name="Picture 2" svg:x="2.44792in" svg:y="3.50153in" svg:width="7.4375in" svg:height="2.80402in" style:rel-width="scale" style:rel-height="scale">
          <draw:image xlink:href="media/image11.png" xlink:type="simple" xlink:show="embed" xlink:actuate="onLoad"/>
          <svg:title/>
          <svg:desc/>
        </draw:frame>
        <draw:custom-shape svg:x="2.6in" svg:y="6.4in" svg:width="7.91111in" svg:height="0.53333in" draw:id="id172" draw:style-name="a1822" draw:name="Oval 1">
          <svg:title/>
          <svg:desc/>
          <text:p text:style-name="a1821" text:class-names="" text:cond-style-name=""><text:span text:style-name="a18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4" draw:style-name="a1823" draw:master-page-name="Master2-Layout1-obj-OBJECT" presentation:presentation-page-layout-name="Master2-PPL1" draw:id="Slide-269">
        <draw:frame draw:id="id173" draw:style-name="a1824" draw:name="Picture 3" svg:x="0.13643in" svg:y="0.3299in" svg:width="12.33333in" svg:height="6.83309in" style:rel-width="scale" style:rel-height="scale">
          <draw:image xlink:href="media/image25.png" xlink:type="simple" xlink:show="embed" xlink:actuate="onLoad"/>
          <svg:title/>
          <svg:desc>A screenshot of a website

AI-generated content may be incorrect.</svg:desc>
        </draw:frame>
      </draw:page>
      <draw:page draw:name="Slide15" draw:style-name="a1825" draw:master-page-name="Master2-Layout2-twoObj-TWO_OBJECTS" presentation:presentation-page-layout-name="Master2-PPL2" draw:id="Slide-270">
        <draw:frame draw:id="id174" draw:style-name="a1826" draw:name="Picture 5" svg:x="0in" svg:y="0.41934in" svg:width="12.35772in" svg:height="6.65116in" style:rel-width="scale" style:rel-height="scale">
          <draw:image xlink:href="media/image26.png" xlink:type="simple" xlink:show="embed" xlink:actuate="onLoad"/>
          <svg:title/>
          <svg:desc>A screenshot of a web page</svg:desc>
        </draw:frame>
      </draw:page>
      <draw:page draw:name="Slide16" draw:style-name="a1827" draw:master-page-name="Master2-Layout2-twoObj-TWO_OBJECTS" presentation:presentation-page-layout-name="Master2-PPL2" draw:id="Slide-271">
        <draw:frame draw:id="id175" draw:style-name="a1828" draw:name="Picture 5" svg:x="0.09146in" svg:y="0.64029in" svg:width="12.20529in" svg:height="5.84341in" style:rel-width="scale" style:rel-height="scale">
          <draw:image xlink:href="media/image27.png" xlink:type="simple" xlink:show="embed" xlink:actuate="onLoad"/>
          <svg:title/>
          <svg:desc>A screenshot of a computer</svg:desc>
        </draw:frame>
      </draw:page>
      <draw:page draw:name="Slide11" draw:style-name="a1829" draw:master-page-name="Master2-Layout1-obj-OBJECT" presentation:presentation-page-layout-name="Master2-PPL1" draw:id="Slide-266">
        <draw:frame draw:id="id176" presentation:style-name="a1832" draw:name="Google Shape;181;p25" svg:x="1.38in" svg:y="0.4in" svg:width="10.6in" svg:height="1.44965in" presentation:class="title" presentation:placeholder="false">
          <draw:text-box>
            <text:p text:style-name="a1831" text:class-names="" text:cond-style-name=""><text:span text:style-name="a1830" text:class-names="">References</text:span></text:p>
          </draw:text-box>
          <svg:title/>
          <svg:desc/>
        </draw:frame>
        <draw:frame draw:id="id177" draw:style-name="a1835" draw:name="Google Shape;183;p25" svg:x="12.35in" svg:y="6.75001in" svg:width="1in" svg:height="0.6493in">
          <draw:text-box>
            <text:p text:style-name="a1834" text:class-names="" text:cond-style-name=""><text:span text:style-name="a1833" text:class-names=""><text:page-number style:num-format="1" text:fixed="false"/></text:span></text:p>
          </draw:text-box>
          <svg:title/>
          <svg:desc/>
        </draw:frame>
        <draw:frame draw:id="id178" presentation:style-name="a1861" draw:name="Text Placeholder 1" svg:x="1.19343in" svg:y="1.99566in" svg:width="10.94647in" svg:height="5.50434in" presentation:class="outline" presentation:placeholder="false">
          <draw:text-box>
            <text:list text:style-name="a1839">
              <text:list-item>
                <text:p text:style-name="a1838" text:class-names="" text:cond-style-name=""><text:span text:style-name="a1836" text:class-names="">[1] Elviwani, Siahaan, A. P. U., &amp; Fitriana, L. (n.d.). Performance-based Stable Matching using Gale–Shapley Algorithm.<text:s text:c="1"/></text:span><text:span text:style-name="a1837" text:class-names=""/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[2] Suakanto, S., Siswanto, J., Prasetyo, I. R., Hardiyanti, M. (2021). Interview Bot for Improving Human Resource Management. In 2021 Int. Conf. on ICT for Smart<text:s text:c="1"/>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Society (ICISS), pp. 4644–4647. IEEE. DOI: 10.1109/ICISS53185.2021.9533248.<text:s text:c="1"/>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>[3] Mendoza, A. A. D., Barbosa, L. J. C., Cortez, D. M. A., Dioses, R. M., Agustin, V. A., Regala, R. C. (2022). Enhancement of Gale–Shapley algorithm witimbalanced<text:s text:c="1"/></text:span></text:p>
              </text:list-item>
            </text:list>
            <text:list text:style-name="a1851">
              <text:list-item>
                <text:p text:style-name="a1850" text:class-names="" text:cond-style-name=""><text:span text:style-name="a1849" text:class-names="">sets for hiring and job finding applications. Indonesian Journal of Electrical Engineering and Computer Science, 27(2), 954–958. DOI: 10.11591/ijeecs.v27.i2.pp954<text:s text:c="1"/>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>958.<text:s text:c="1"/>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>[4] Will, P., Krpan, D., &amp; Lordan, G. (2023). People versus Machines: Introducing the HIRE Framework. Artificial Intelligence Review, 56, 1071–1100. Accepted: 13 April 2022. DOI: 10.1007/s10462-022-10193-6.<text:s text:c="1"/>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/></text:p>
              </text:list-item>
            </text:list>
          </draw:text-box>
          <svg:title/>
          <svg:desc/>
        </draw:frame>
        <presentation:notes draw:style-name="a1864">
          <draw:frame draw:id="id179" presentation:style-name="a1862" draw:name="Google Shape;178;p11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27" svg:x="0.75in" svg:y="1.25in" svg:width="6in" svg:height="3.375in" presentation:class="page" draw:id="id180" presentation:style-name="a1863" draw:name="Google Shape;179;p11:notes">
            <svg:title/>
            <svg:desc/>
          </draw:page-thumbnail>
        </presentation:notes>
      </draw:page>
      <draw:page draw:name="Slide27" draw:style-name="a1865" draw:master-page-name="Master2-Layout2-twoObj-TWO_OBJECTS" presentation:presentation-page-layout-name="Master2-PPL2" draw:id="Slide-282">
        <draw:frame draw:id="id181" presentation:style-name="a1888" draw:name="Text Placeholder 1" svg:x="0.64804in" svg:y="0.72398in" svg:width="11.01863in" svg:height="5.0571in" presentation:class="outline" presentation:placeholder="false">
          <draw:text-box>
            <text:list text:style-name="a1869">
              <text:list-item>
                <text:p text:style-name="a1868" text:class-names="" text:cond-style-name=""><text:span text:style-name="a1866" text:class-names="">[5] Thangaramya, K., Roselind, J. D., Logeswari, G., Ahirwar, N., &amp; Gajendran, S. (2024). Automated Resume Parsing and Ranking using Natural Language Processing. In 2024 3rd IEEE Int. Conf. on Artificial Intelligence for Internet of Things (AIIoT). DOI: 10.1109/AIIoT58432.2024.10574696.<text:s text:c="1"/></text:span><text:span text:style-name="a1867" text:class-names=""/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[6] Hosseini, H., Roy, S., &amp; Zhang, D. (2024). Putting Gale &amp; Shapley to Work: Guaranteeing Stability Through Learning. In 38th Conf. on Neural Information Processing Systems (NeurIPS 2024).<text:s text:c="1"/>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[7] Aly, A. M., El Alem, A., Alawida, M., AlBloushi, S., &amp; Aldhaen, G. (2025). Optimizing Recruitment with AI: A Smarter Approach to Candidate Evaluation. In<text:s text:c="1"/>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20<text:s text:c="1"/>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>Sage — Literature Review 2025 1st Int. Conf. on Computational Intelligence Approaches and Applications (ICCIAA). DOI: 10.1109/ICCIAA65327.2025.11013684.<text:s text:c="1"/>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[8] Mujtaba, D. F., &amp; Mahapatra, N. R. (2025). Fairness in AI-Driven Recruitment: Challenges, Metrics, Methods, and Future Directions. arXiv preprint arXiv:2405.19699v3.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1" style:display-name="OBJECT">
      <presentation:placeholder presentation:object="object" svg:x="1.38in" svg:y="2in" svg:width="9.4in" svg:height="4.75868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2" style:display-name="TWO_OBJECTS"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3" style:display-name="TWO_OBJECTS_WITH_TEXT">
      <presentation:placeholder presentation:object="outline" svg:x="1.38in" svg:y="1.87408in" svg:width="4.9in" svg:height="0.8in"/>
      <presentation:placeholder presentation:object="outline" svg:x="1.38in" svg:y="2.74229in" svg:width="4.9in" svg:height="4.00771in"/>
      <presentation:placeholder presentation:object="object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4" style:display-name="TITLE_ONLY"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5" style:display-name="BLANK"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6" style:display-name="OBJECT_WITH_CAPTION_TEXT">
      <presentation:placeholder presentation:object="outline" svg:x="4.92593in" svg:y="0.75in" svg:width="6.64815in" svg:height="6in"/>
      <presentation:placeholder presentation:object="object" svg:x="0.92in" svg:y="2.2963in" svg:width="3.5in" svg:height="4.16667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7" style:display-name="PICTURE_WITH_CAPTION_TEXT">
      <presentation:placeholder presentation:object="title" svg:x="1in" svg:y="5.75in" svg:width="10.91667in" svg:height="1in"/>
      <presentation:placeholder presentation:object="outline" svg:x="1in" svg:y="6.68044in" svg:width="10.91667in" svg:height="0.6529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8" style:display-name="VERTICAL_TEXT">
      <presentation:placeholder presentation:object="outline" svg:x="3.70067in" svg:y="-0.32066in" svg:width="4.75868in" svg:height="9.4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presentation-page-layout style:name="Master2-PPL9" style:display-name="VERTICAL_TITLE_AND_VERTICAL_TEXT">
      <presentation:placeholder presentation:object="outline" svg:x="1.83766in" svg:y="-0.58767in" svg:width="6.44965in" svg:height="8.45833in"/>
      <presentation:placeholder presentation:object="date-time" svg:x="11.80837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001in" svg:width="1in" svg:height="0.64931in"/>
    </style:presentation-page-layout>
    <style:style style:family="table-cell" style:name="a520">
      <style:table-cell-properties fo:background-color="#ffc000"/>
    </style:style>
    <style:style style:family="table-cell" style:name="a521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2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52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52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525">
      <style:table-cell-properties/>
      <style:text-properties fo:color="#000000" fo:font-family="+mn-lt" style:font-family-asian="+mn-ea" style:font-family-complex="+mn-cs"/>
    </style:style>
    <style:style style:family="table-cell" style:name="a526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490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527">
      <style:table-cell-properties fo:background-color="#ed7d31"/>
    </style:style>
    <style:style style:family="table-cell" style:name="a491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528">
      <style:table-cell-properties fo:background-color="#ed7d31" fo:border-top="0.00347in solid #ed7d31" fo:border-bottom="0.00347in solid #ed7d31"/>
    </style:style>
    <style:style style:family="table-cell" style:name="a49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529">
      <style:table-cell-properties fo:background-color="#ed7d31"/>
    </style:style>
    <style:style style:family="table-cell" style:name="a49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94">
      <style:table-cell-properties/>
    </style:style>
    <style:style style:family="table-cell" style:name="a495">
      <style:table-cell-properties fo:background-color="#cfd5ea"/>
    </style:style>
    <style:style style:family="table-cell" style:name="a496">
      <style:table-cell-properties/>
    </style:style>
    <style:style style:family="table-cell" style:name="a497">
      <style:table-cell-properties fo:background-color="#cfd5ea"/>
    </style:style>
    <style:style style:family="table-cell" style:name="a49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0">
      <style:table-cell-properties fo:background-color="#ed7d31"/>
    </style:style>
    <style:style style:family="table-cell" style:name="a531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2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533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534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535">
      <style:table-cell-properties fo:background-color="#fcece8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536">
      <style:table-cell-properties fo:background-color="#f8d7cd"/>
    </style:style>
    <style:style style:family="table-cell" style:name="a537">
      <style:table-cell-properties fo:background-color="#f8d7cd"/>
    </style:style>
    <style:style style:family="table-cell" style:name="a538">
      <style:table-cell-properties fo:background-color="#fcece8"/>
      <style:text-properties fo:font-family="" style:font-family-asian="" style:font-family-complex="" fo:font-weight="bold" style:font-weight-asian="bold" style:font-weight-complex="bold"/>
    </style:style>
    <style:style style:family="table-cell" style:name="a539">
      <style:table-cell-properties fo:background-color="#fcece8" fo:border-top="0.02778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45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51">
      <style:table-cell-properties/>
    </style:style>
    <style:style style:family="table-cell" style:name="a452">
      <style:table-cell-properties fo:background-color="#f8d7cd"/>
    </style:style>
    <style:style style:family="table-cell" style:name="a453">
      <style:table-cell-properties/>
    </style:style>
    <style:style style:family="table-cell" style:name="a454">
      <style:table-cell-properties fo:background-color="#f8d7cd"/>
    </style:style>
    <style:style style:family="table-cell" style:name="a45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0">
      <style:table-cell-properties/>
    </style:style>
    <style:style style:family="table-cell" style:name="a461">
      <style:table-cell-properties fo:background-color="#cbcbcb"/>
    </style:style>
    <style:style style:family="table-cell" style:name="a462">
      <style:table-cell-properties/>
    </style:style>
    <style:style style:family="table-cell" style:name="a463">
      <style:table-cell-properties fo:background-color="#cbcbcb"/>
    </style:style>
    <style:style style:family="table-cell" style:name="a46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69">
      <style:table-cell-properties fo:background-color="#cbcbcb"/>
    </style:style>
    <style:style style:family="table-cell" style:name="a50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2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503">
      <style:table-cell-properties fo:background-color="#000000"/>
    </style:style>
    <style:style style:family="table-cell" style:name="a504">
      <style:table-cell-properties fo:background-color="#000000"/>
    </style:style>
    <style:style style:family="table-cell" style:name="a505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506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5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0">
      <style:table-cell-properties fo:background-color="#cbcbcb"/>
    </style:style>
    <style:style style:family="table-cell" style:name="a50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1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509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72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4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5">
      <style:table-cell-properties fo:background-color="#e7eb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76">
      <style:table-cell-properties/>
    </style:style>
    <style:style style:family="table-cell" style:name="a477">
      <style:table-cell-properties fo:background-color="#ccd4cc"/>
    </style:style>
    <style:style style:family="table-cell" style:name="a478">
      <style:table-cell-properties/>
    </style:style>
    <style:style style:family="table-cell" style:name="a479">
      <style:table-cell-properties fo:background-color="#ccd4cc"/>
    </style:style>
    <style:style style:family="table-cell" style:name="a510">
      <style:table-cell-properties fo:background-color="#e7e7e7"/>
    </style:style>
    <style:style style:family="table-cell" style:name="a511">
      <style:table-cell-properties fo:background-color="#e7e7e7"/>
    </style:style>
    <style:style style:family="table-cell" style:name="a5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13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5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1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16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517">
      <style:table-cell-properties fo:background-color="#ffc000"/>
    </style:style>
    <style:style style:family="table-cell" style:name="a480">
      <style:table-cell-properties fo:background-color="#196b2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18">
      <style:table-cell-properties fo:background-color="#ffc000" fo:border-top="0.00347in solid #ffc000" fo:border-bottom="0.00347in solid #ffc000"/>
    </style:style>
    <style:style style:family="table-cell" style:name="a481">
      <style:table-cell-properties fo:background-color="#196b2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19">
      <style:table-cell-properties fo:background-color="#ffc000"/>
    </style:style>
    <style:style style:family="table-cell" style:name="a482">
      <style:table-cell-properties fo:background-color="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3">
      <style:table-cell-properties fo:background-color="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4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85">
      <style:table-cell-properties fo:background-color="#4472c4"/>
    </style:style>
    <style:style style:family="table-cell" style:name="a486">
      <style:table-cell-properties fo:background-color="#4472c4" fo:border-top="0.00347in solid #4472c4" fo:border-bottom="0.00347in solid #4472c4"/>
    </style:style>
    <style:style style:family="table-cell" style:name="a487">
      <style:table-cell-properties fo:background-color="#4472c4"/>
    </style:style>
    <style:style style:family="graphic" style:name="Graphics"/>
    <style:style style:family="table-cell" style:name="a488">
      <style:table-cell-properties fo:background-color="#4472c4"/>
    </style:style>
    <style:style style:family="table-cell" style:name="a489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21E4AEA4-8DFA-4A89-87EB-49C32662AFE0}">
      <table:first-row table:style-name="a455" table:paragraph-style-name=""/>
      <table:last-row table:style-name="a456" table:paragraph-style-name=""/>
      <table:first-column table:style-name="a457" table:paragraph-style-name=""/>
      <table:last-column table:style-name="a458" table:paragraph-style-name=""/>
      <table:body table:style-name="a450" table:paragraph-style-name=""/>
      <table:even-rows table:style-name="a453" table:paragraph-style-name=""/>
      <table:odd-rows table:style-name="a454" table:paragraph-style-name=""/>
      <table:even-columns table:style-name="a451" table:paragraph-style-name=""/>
      <table:odd-columns table:style-name="a452" table:paragraph-style-name=""/>
    </table:table-template>
    <table:table-template table:name="{073A0DAA-6AF3-43AB-8588-CEC1D06C72B9}">
      <table:first-row table:style-name="a464" table:paragraph-style-name=""/>
      <table:last-row table:style-name="a465" table:paragraph-style-name=""/>
      <table:first-column table:style-name="a466" table:paragraph-style-name=""/>
      <table:last-column table:style-name="a467" table:paragraph-style-name=""/>
      <table:body table:style-name="a459" table:paragraph-style-name=""/>
      <table:even-rows table:style-name="a462" table:paragraph-style-name=""/>
      <table:odd-rows table:style-name="a463" table:paragraph-style-name=""/>
      <table:even-columns table:style-name="a460" table:paragraph-style-name=""/>
      <table:odd-columns table:style-name="a461" table:paragraph-style-name=""/>
    </table:table-template>
    <table:table-template table:name="{D7AC3CCA-C797-4891-BE02-D94E43425B78}">
      <table:first-row table:style-name="a471" table:paragraph-style-name=""/>
      <table:last-row table:style-name="a472" table:paragraph-style-name=""/>
      <table:first-column table:style-name="a473" table:paragraph-style-name=""/>
      <table:last-column table:style-name="a474" table:paragraph-style-name=""/>
      <table:body table:style-name="a468" table:paragraph-style-name=""/>
      <table:odd-rows table:style-name="a470" table:paragraph-style-name=""/>
      <table:odd-columns table:style-name="a469" table:paragraph-style-name=""/>
    </table:table-template>
    <table:table-template table:name="{F5AB1C69-6EDB-4FF4-983F-18BD219EF322}">
      <table:first-row table:style-name="a480" table:paragraph-style-name=""/>
      <table:last-row table:style-name="a481" table:paragraph-style-name=""/>
      <table:first-column table:style-name="a482" table:paragraph-style-name=""/>
      <table:last-column table:style-name="a483" table:paragraph-style-name=""/>
      <table:body table:style-name="a475" table:paragraph-style-name=""/>
      <table:even-rows table:style-name="a478" table:paragraph-style-name=""/>
      <table:odd-rows table:style-name="a479" table:paragraph-style-name=""/>
      <table:even-columns table:style-name="a476" table:paragraph-style-name=""/>
      <table:odd-columns table:style-name="a477" table:paragraph-style-name=""/>
    </table:table-template>
    <table:table-template table:name="{3C2FFA5D-87B4-456A-9821-1D502468CF0F}">
      <table:first-row table:style-name="a489" table:paragraph-style-name=""/>
      <table:last-row table:style-name="a490" table:paragraph-style-name=""/>
      <table:first-column table:style-name="a491" table:paragraph-style-name=""/>
      <table:last-column table:style-name="a492" table:paragraph-style-name=""/>
      <table:body table:style-name="a484" table:paragraph-style-name=""/>
      <table:even-rows table:style-name="a487" table:paragraph-style-name=""/>
      <table:odd-rows table:style-name="a488" table:paragraph-style-name=""/>
      <table:even-columns table:style-name="a485" table:paragraph-style-name=""/>
      <table:odd-columns table:style-name="a486" table:paragraph-style-name=""/>
    </table:table-template>
    <table:table-template table:name="{5C22544A-7EE6-4342-B048-85BDC9FD1C3A}">
      <table:first-row table:style-name="a498" table:paragraph-style-name=""/>
      <table:last-row table:style-name="a499" table:paragraph-style-name=""/>
      <table:first-column table:style-name="a500" table:paragraph-style-name=""/>
      <table:last-column table:style-name="a501" table:paragraph-style-name=""/>
      <table:body table:style-name="a493" table:paragraph-style-name=""/>
      <table:even-rows table:style-name="a496" table:paragraph-style-name=""/>
      <table:odd-rows table:style-name="a497" table:paragraph-style-name=""/>
      <table:even-columns table:style-name="a494" table:paragraph-style-name=""/>
      <table:odd-columns table:style-name="a495" table:paragraph-style-name=""/>
    </table:table-template>
    <table:table-template table:name="{616DA210-FB5B-4158-B5E0-FEB733F419BA}">
      <table:first-row table:style-name="a505" table:paragraph-style-name=""/>
      <table:last-row table:style-name="a506" table:paragraph-style-name=""/>
      <table:first-column table:style-name="a507" table:paragraph-style-name=""/>
      <table:last-column table:style-name="a508" table:paragraph-style-name=""/>
      <table:body table:style-name="a502" table:paragraph-style-name=""/>
      <table:odd-rows table:style-name="a504" table:paragraph-style-name=""/>
      <table:odd-columns table:style-name="a503" table:paragraph-style-name=""/>
    </table:table-template>
    <table:table-template table:name="{793D81CF-94F2-401A-BA57-92F5A7B2D0C5}">
      <table:first-row table:style-name="a512" table:paragraph-style-name=""/>
      <table:last-row table:style-name="a513" table:paragraph-style-name=""/>
      <table:first-column table:style-name="a514" table:paragraph-style-name=""/>
      <table:last-column table:style-name="a515" table:paragraph-style-name=""/>
      <table:body table:style-name="a509" table:paragraph-style-name=""/>
      <table:odd-rows table:style-name="a511" table:paragraph-style-name=""/>
      <table:odd-columns table:style-name="a510" table:paragraph-style-name=""/>
    </table:table-template>
    <table:table-template table:name="{775DCB02-9BB8-47FD-8907-85C794F793BA}">
      <table:first-row table:style-name="a521" table:paragraph-style-name=""/>
      <table:last-row table:style-name="a522" table:paragraph-style-name=""/>
      <table:first-column table:style-name="a523" table:paragraph-style-name=""/>
      <table:last-column table:style-name="a524" table:paragraph-style-name=""/>
      <table:body table:style-name="a516" table:paragraph-style-name=""/>
      <table:even-rows table:style-name="a519" table:paragraph-style-name=""/>
      <table:odd-rows table:style-name="a520" table:paragraph-style-name=""/>
      <table:even-columns table:style-name="a517" table:paragraph-style-name=""/>
      <table:odd-columns table:style-name="a518" table:paragraph-style-name=""/>
    </table:table-template>
    <table:table-template table:name="{2D5ABB26-0587-4C30-8999-92F81FD0307C}">
      <table:body table:style-name="a525" table:paragraph-style-name=""/>
    </table:table-template>
    <table:table-template table:name="{284E427A-3D55-4303-BF80-6455036E1DE7}">
      <table:first-row table:style-name="a531" table:paragraph-style-name=""/>
      <table:last-row table:style-name="a532" table:paragraph-style-name=""/>
      <table:first-column table:style-name="a533" table:paragraph-style-name=""/>
      <table:last-column table:style-name="a534" table:paragraph-style-name=""/>
      <table:body table:style-name="a526" table:paragraph-style-name=""/>
      <table:even-rows table:style-name="a529" table:paragraph-style-name=""/>
      <table:odd-rows table:style-name="a530" table:paragraph-style-name=""/>
      <table:even-columns table:style-name="a527" table:paragraph-style-name=""/>
      <table:odd-columns table:style-name="a528" table:paragraph-style-name=""/>
    </table:table-template>
    <table:table-template table:name="{8A107856-5554-42FB-B03E-39F5DBC370BA}">
      <table:first-row table:style-name="a538" table:paragraph-style-name=""/>
      <table:last-row table:style-name="a539" table:paragraph-style-name=""/>
      <table:first-column table:style-name="a540" table:paragraph-style-name=""/>
      <table:last-column table:style-name="a541" table:paragraph-style-name=""/>
      <table:body table:style-name="a535" table:paragraph-style-name=""/>
      <table:odd-rows table:style-name="a537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5%" fo:text-align="left" style:tab-stop-distance="1in" fo:margin-left="0.5in" fo:margin-right="0in" fo:text-indent="-0.36111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14%" fo:text-align="left" style:tab-stop-distance="1in" fo:margin-left="0.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5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5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0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3434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e8e93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0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6f5f4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6f5f4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e6e4d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3434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a7a19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0569in" style:font-size-asian="0.30569in" style:font-size-complex="0.30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5%" fo:text-align="left" style:tab-stop-distance="1in" fo:margin-left="0.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4597in" style:font-size-asian="0.14597in" style:font-size-complex="0.14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4998in" fo:padding-bottom="0.04998in" fo:padding-left="0.04998in" fo:padding-right="0.04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9999in" fo:padding-bottom="0.09999in" fo:padding-left="0.09999in" fo:padding-right="0.09999in" draw:textarea-vertical-align="middle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3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388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2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212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06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12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174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97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.13889in" text:min-label-width="0.36111in"/>
        <style:text-properties fo:color="#6f6f74" fo:font-family="Arial" fo:font-size="0.22222in"/>
      </text:list-level-style-bullet>
      <text:list-level-style-bullet text:level="2" text:bullet-char="•">
        <style:list-level-properties text:space-before="0.38889in" text:min-label-width="0.36111in"/>
        <style:text-properties fo:color="#6f6f74" fo:font-family="Arial" fo:font-size="0.22222in"/>
      </text:list-level-style-bullet>
      <text:list-level-style-bullet text:level="3" text:bullet-char="•">
        <style:list-level-properties text:space-before="0.88889in" text:min-label-width="0.36111in"/>
        <style:text-properties fo:color="#6f6f74" fo:font-family="Arial" fo:font-size="0.22222in"/>
      </text:list-level-style-bullet>
      <text:list-level-style-bullet text:level="4" text:bullet-char="•">
        <style:list-level-properties text:space-before="1.38889in" text:min-label-width="0.36111in"/>
        <style:text-properties fo:color="#6f6f74" fo:font-family="Arial" fo:font-size="0.22222in"/>
      </text:list-level-style-bullet>
      <text:list-level-style-bullet text:level="5" text:bullet-char="•">
        <style:list-level-properties text:space-before="1.88889in" text:min-label-width="0.36111in"/>
        <style:text-properties fo:color="#6f6f74" fo:font-family="Arial" fo:font-size="0.22222in"/>
      </text:list-level-style-bullet>
      <text:list-level-style-bullet text:level="6" text:bullet-char="•">
        <style:list-level-properties text:space-before="2.38889in" text:min-label-width="0.36111in"/>
        <style:text-properties fo:color="#6f6f74" fo:font-family="Arial" fo:font-size="0.22222in"/>
      </text:list-level-style-bullet>
      <text:list-level-style-bullet text:level="7" text:bullet-char="•">
        <style:list-level-properties text:space-before="2.88889in" text:min-label-width="0.36111in"/>
        <style:text-properties fo:color="#6f6f74" fo:font-family="Arial" fo:font-size="0.22222in"/>
      </text:list-level-style-bullet>
      <text:list-level-style-bullet text:level="8" text:bullet-char="•">
        <style:list-level-properties text:space-before="3.38889in" text:min-label-width="0.36111in"/>
        <style:text-properties fo:color="#6f6f74" fo:font-family="Arial" fo:font-size="0.22222in"/>
      </text:list-level-style-bullet>
      <text:list-level-style-bullet text:level="9" text:bullet-char="•">
        <style:list-level-properties text:space-before="3.88889in" text:min-label-width="0.36111in"/>
        <style:text-properties fo:color="#6f6f74" fo:font-family="Arial" fo:font-size="0.22222in"/>
      </text:list-level-style-bullet>
    </text:list-style>
    <text:list-style style:name="a178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422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  <text:list-style style:name="a354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9">
      <text:list-level-style-bullet text:level="1" text:bullet-char="•">
        <style:list-level-properties text:space-before="0.15in" text:min-label-width="0.35in"/>
        <style:text-properties fo:color="#6f6f74" fo:font-family="Arial" fo:font-size="0.2in"/>
      </text:list-level-style-bullet>
      <text:list-level-style-bullet text:level="2" text:bullet-char="•">
        <style:list-level-properties text:space-before="0.4in" text:min-label-width="0.35in"/>
        <style:text-properties fo:color="#6f6f74" fo:font-family="Arial" fo:font-size="0.2in"/>
      </text:list-level-style-bullet>
      <text:list-level-style-bullet text:level="3" text:bullet-char="•">
        <style:list-level-properties text:space-before="0.9in" text:min-label-width="0.35in"/>
        <style:text-properties fo:color="#6f6f74" fo:font-family="Arial" fo:font-size="0.2in"/>
      </text:list-level-style-bullet>
      <text:list-level-style-bullet text:level="4" text:bullet-char="•">
        <style:list-level-properties text:space-before="1.4in" text:min-label-width="0.35in"/>
        <style:text-properties fo:color="#6f6f74" fo:font-family="Arial" fo:font-size="0.2in"/>
      </text:list-level-style-bullet>
      <text:list-level-style-bullet text:level="5" text:bullet-char="•">
        <style:list-level-properties text:space-before="1.9in" text:min-label-width="0.35in"/>
        <style:text-properties fo:color="#6f6f74" fo:font-family="Arial" fo:font-size="0.2in"/>
      </text:list-level-style-bullet>
      <text:list-level-style-bullet text:level="6" text:bullet-char="•">
        <style:list-level-properties text:space-before="2.4in" text:min-label-width="0.35in"/>
        <style:text-properties fo:color="#6f6f74" fo:font-family="Arial" fo:font-size="0.2in"/>
      </text:list-level-style-bullet>
      <text:list-level-style-bullet text:level="7" text:bullet-char="•">
        <style:list-level-properties text:space-before="2.9in" text:min-label-width="0.35in"/>
        <style:text-properties fo:color="#6f6f74" fo:font-family="Arial" fo:font-size="0.2in"/>
      </text:list-level-style-bullet>
      <text:list-level-style-bullet text:level="8" text:bullet-char="•">
        <style:list-level-properties text:space-before="3.4in" text:min-label-width="0.35in"/>
        <style:text-properties fo:color="#6f6f74" fo:font-family="Arial" fo:font-size="0.2in"/>
      </text:list-level-style-bullet>
      <text:list-level-style-bullet text:level="9" text:bullet-char="•">
        <style:list-level-properties text:space-before="3.9in" text:min-label-width="0.35in"/>
        <style:text-properties fo:color="#6f6f74" fo:font-family="Arial" fo:font-size="0.2in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Google Shape;10;p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Google Shape;11;p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22" draw:name="Google Shape;12;p1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transform="translate(-1.04166in -0.19965in) rotate(-4.71239) translate(12.85004in 1.29166in)" draw:name="Google Shape;13;p1" svg:width="2.08333in" svg:height="0.39931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transform="translate(-1.95833in -0.19965in) rotate(-4.71239) translate(12.85003in 4.62497in)" draw:name="Google Shape;14;p1" svg:width="3.91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Google Shape;15;p1" svg:x="12.35in" svg:y="6.75001in" svg:width="1in" svg:height="0.64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frame draw:id="id6" presentation:style-name="a34" draw:name="Google Shape;3;n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Google Shape;4;n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" draw:name="Google Shape;5;n">
          <svg:title/>
          <svg:desc/>
        </draw:page-thumbnail>
        <draw:frame draw:id="id9" presentation:style-name="a41" draw:name="Google Shape;6;n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Google Shape;7;n" svg:x="0in" svg:y="9.49826in" svg:width="3.25in" svg:height="0.50174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Google Shape;8;n" svg:x="4.24826in" svg:y="9.49826in" svg:width="3.25in" svg:height="0.50174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" style:page-layout-name="pageLayout1" draw:style-name="a49">
      <draw:frame draw:id="id12" presentation:style-name="a52" draw:name="Google Shape;17;p2" svg:x="1.38in" svg:y="0.83in" svg:width="10.3in" svg:height="4.42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3" presentation:style-name="a55" draw:name="Google Shape;18;p2" svg:x="1.38in" svg:y="5.25in" svg:width="10.3in" svg:height="1.85in" presentation:class="subtitl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transform="translate(-1.04166in -0.19965in) rotate(-4.71239) translate(12.85004in 1.29166in)" draw:name="Google Shape;19;p2" svg:width="2.08333in" svg:height="0.39931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transform="translate(-1.95833in -0.19965in) rotate(-4.71239) translate(12.85003in 4.62497in)" draw:name="Google Shape;20;p2" svg:width="3.91667in" svg:height="0.39931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6" presentation:style-name="a64" draw:name="Google Shape;21;p2" svg:x="12.35in" svg:y="6.75001in" svg:width="1in" svg:height="0.64931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67" draw:name="Google Shape;22;p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4">
        <draw:frame draw:id="id6" presentation:style-name="a70" draw:name="Google Shape;3;n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Google Shape;4;n" svg:x="4.24826in" svg:y="0in" svg:width="3.25in" svg:height="0.50174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4" draw:name="Google Shape;5;n">
          <svg:title/>
          <svg:desc/>
        </draw:page-thumbnail>
        <draw:frame draw:id="id9" presentation:style-name="a77" draw:name="Google Shape;6;n" svg:x="0.75in" svg:y="4.8125in" svg:width="6in" svg:height="3.9375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Google Shape;7;n" svg:x="0in" svg:y="9.49826in" svg:width="3.25in" svg:height="0.50174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Google Shape;8;n" svg:x="4.24826in" svg:y="9.49826in" svg:width="3.25in" svg:height="0.50174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ew" style:page-layout-name="pageLayout1" draw:style-name="a85">
      <draw:custom-shape svg:x="12.35in" svg:y="0in" svg:width="1in" svg:height="7.5in" draw:id="id18" draw:style-name="a88" draw:name="Google Shape;24;p3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1" draw:name="Google Shape;25;p3" svg:x="1.38in" svg:y="0.4in" svg:width="10.6in" svg:height="1.44965in" presentation:class="titl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107" draw:name="Google Shape;26;p3" svg:x="1.38in" svg:y="2in" svg:width="9.4in" svg:height="4.758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cond le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0" draw:transform="translate(-1.04166in -0.19965in) rotate(-4.71239) translate(12.85004in 1.29166in)" draw:name="Google Shape;27;p3" svg:width="2.08333in" svg:height="0.39931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2" presentation:style-name="a113" draw:transform="translate(-1.95833in -0.19965in) rotate(-4.71239) translate(12.85003in 4.62497in)" draw:name="Google Shape;28;p3" svg:width="3.91667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3" presentation:style-name="a116" draw:name="Google Shape;29;p3" svg:x="12.35in" svg:y="6.75001in" svg:width="1in" svg:height="0.64931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frame draw:id="id6" presentation:style-name="a119" draw:name="Google Shape;3;n" svg:x="0in" svg:y="0in" svg:width="3.25in" svg:height="0.50174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7" presentation:style-name="a122" draw:name="Google Shape;4;n" svg:x="4.24826in" svg:y="0in" svg:width="3.25in" svg:height="0.50174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23" draw:name="Google Shape;5;n">
          <svg:title/>
          <svg:desc/>
        </draw:page-thumbnail>
        <draw:frame draw:id="id9" presentation:style-name="a126" draw:name="Google Shape;6;n" svg:x="0.75in" svg:y="4.8125in" svg:width="6in" svg:height="3.9375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Google Shape;7;n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Google Shape;8;n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obj-OBJECT" style:page-layout-name="pageLayout1" draw:style-name="a134">
      <draw:custom-shape svg:x="12.35in" svg:y="0in" svg:width="1in" svg:height="7.5in" draw:id="id24" draw:layer="Master2-bg" draw:style-name="a137" draw:name="Google Shape;24;p3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2;p4" svg:x="1.38in" svg:y="2in" svg:width="9.4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/></text:p>
            </text:list-item>
          </text:list>
        </draw:text-box>
        <svg:title/>
        <svg:desc/>
      </draw:frame>
      <draw:frame draw:id="id26" presentation:style-name="a144" draw:transform="translate(-1.04166in -0.19965in) rotate(-4.71239) translate(12.85004in 1.29166in)" draw:name="Google Shape;33;p4" svg:width="2.08333in" svg:height="0.39931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7" draw:transform="translate(-1.95833in -0.19965in) rotate(-4.71239) translate(12.85003in 4.62497in)" draw:name="Google Shape;34;p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8" presentation:style-name="a150" draw:name="Google Shape;35;p4" svg:x="12.35in" svg:y="6.75001in" svg:width="1in" svg:height="0.64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frame draw:id="id6" presentation:style-name="a153" draw:name="Google Shape;3;n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Google Shape;4;n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7" draw:name="Google Shape;5;n">
          <svg:title/>
          <svg:desc/>
        </draw:page-thumbnail>
        <draw:frame draw:id="id9" presentation:style-name="a160" draw:name="Google Shape;6;n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Google Shape;7;n" svg:x="0in" svg:y="9.49826in" svg:width="3.25in" svg:height="0.50174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1" presentation:style-name="a166" draw:name="Google Shape;8;n" svg:x="4.24826in" svg:y="9.49826in" svg:width="3.25in" svg:height="0.50174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twoObj-TWO_OBJECTS" style:page-layout-name="pageLayout1" draw:style-name="a168">
      <draw:custom-shape svg:x="12.35in" svg:y="0in" svg:width="1in" svg:height="7.5in" draw:id="id29" draw:layer="Master2-bg" draw:style-name="a171" draw:name="Google Shape;24;p3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75" draw:name="Google Shape;52;p7" svg:x="1.38in" svg:y="2in" svg:width="4.9in" svg:height="4.7586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/></text:p>
            </text:list-item>
          </text:list>
        </draw:text-box>
        <svg:title/>
        <svg:desc/>
      </draw:frame>
      <draw:frame draw:id="id31" presentation:style-name="a179" draw:name="Google Shape;53;p7" svg:x="6.7in" svg:y="2in" svg:width="4.9in" svg:height="4.7586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/></text:p>
            </text:list-item>
          </text:list>
        </draw:text-box>
        <svg:title/>
        <svg:desc/>
      </draw:frame>
      <draw:frame draw:id="id32" presentation:style-name="a182" draw:transform="translate(-1.04166in -0.19965in) rotate(-4.71239) translate(12.85004in 1.29166in)" draw:name="Google Shape;54;p7" svg:width="2.08333in" svg:height="0.39931in" presentation:class="date-time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3" presentation:style-name="a185" draw:transform="translate(-1.95833in -0.19965in) rotate(-4.71239) translate(12.85003in 4.62497in)" draw:name="Google Shape;55;p7" svg:width="3.91667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34" presentation:style-name="a188" draw:name="Google Shape;56;p7" svg:x="12.35in" svg:y="6.75001in" svg:width="1in" svg:height="0.64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6" presentation:style-name="a191" draw:name="Google Shape;3;n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7" presentation:style-name="a194" draw:name="Google Shape;4;n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95" draw:name="Google Shape;5;n">
          <svg:title/>
          <svg:desc/>
        </draw:page-thumbnail>
        <draw:frame draw:id="id9" presentation:style-name="a198" draw:name="Google Shape;6;n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0" presentation:style-name="a201" draw:name="Google Shape;7;n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Google Shape;8;n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twoTxTwoObj-TWO_OBJECTS_WITH_TEXT" style:page-layout-name="pageLayout1" draw:style-name="a206">
      <draw:custom-shape svg:x="12.35in" svg:y="0in" svg:width="1in" svg:height="7.5in" draw:id="id35" draw:layer="Master2-bg" draw:style-name="a209" draw:name="Google Shape;24;p3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3" draw:name="Google Shape;59;p8" svg:x="1.38in" svg:y="1.87408in" svg:width="4.9in" svg:height="0.8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/></text:p>
            </text:list-item>
          </text:list>
        </draw:text-box>
        <svg:title/>
        <svg:desc/>
      </draw:frame>
      <draw:frame draw:id="id37" presentation:style-name="a217" draw:name="Google Shape;60;p8" svg:x="1.38in" svg:y="2.74229in" svg:width="4.9in" svg:height="4.0077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/></text:p>
            </text:list-item>
          </text:list>
        </draw:text-box>
        <svg:title/>
        <svg:desc/>
      </draw:frame>
      <draw:frame draw:id="id38" presentation:style-name="a220" draw:name="Google Shape;61;p8" svg:x="6.7in" svg:y="1.87408in" svg:width="4.9in" svg:height="0.8in" presentation:class="object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9" presentation:style-name="a224" draw:name="Google Shape;62;p8" svg:x="6.7in" svg:y="2.74229in" svg:width="4.9in" svg:height="4.0077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/></text:p>
            </text:list-item>
          </text:list>
        </draw:text-box>
        <svg:title/>
        <svg:desc/>
      </draw:frame>
      <draw:frame draw:id="id40" presentation:style-name="a227" draw:transform="translate(-1.04166in -0.19965in) rotate(-4.71239) translate(12.85004in 1.29166in)" draw:name="Google Shape;63;p8" svg:width="2.08333in" svg:height="0.39931in" presentation:class="date-time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1" presentation:style-name="a230" draw:transform="translate(-1.95833in -0.19965in) rotate(-4.71239) translate(12.85003in 4.62497in)" draw:name="Google Shape;64;p8" svg:width="3.91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2" presentation:style-name="a233" draw:name="Google Shape;65;p8" svg:x="12.35in" svg:y="6.75001in" svg:width="1in" svg:height="0.64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6" presentation:style-name="a236" draw:name="Google Shape;3;n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7" presentation:style-name="a239" draw:name="Google Shape;4;n" svg:x="4.24826in" svg:y="0in" svg:width="3.25in" svg:height="0.50174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40" draw:name="Google Shape;5;n">
          <svg:title/>
          <svg:desc/>
        </draw:page-thumbnail>
        <draw:frame draw:id="id9" presentation:style-name="a243" draw:name="Google Shape;6;n" svg:x="0.75in" svg:y="4.8125in" svg:width="6in" svg:height="3.9375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Google Shape;7;n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Google Shape;8;n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itleOnly-TITLE_ONLY" style:page-layout-name="pageLayout1" draw:style-name="a251">
      <draw:custom-shape svg:x="12.35in" svg:y="0in" svg:width="1in" svg:height="7.5in" draw:id="id43" draw:layer="Master2-bg" draw:style-name="a254" draw:name="Google Shape;24;p3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257" draw:transform="translate(-1.04166in -0.19965in) rotate(-4.71239) translate(12.85004in 1.29166in)" draw:name="Google Shape;68;p9" svg:width="2.08333in" svg:height="0.39931in" presentation:class="date-time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5" presentation:style-name="a260" draw:transform="translate(-1.95833in -0.19965in) rotate(-4.71239) translate(12.85003in 4.62497in)" draw:name="Google Shape;69;p9" svg:width="3.91667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6" presentation:style-name="a263" draw:name="Google Shape;70;p9" svg:x="12.35in" svg:y="6.75001in" svg:width="1in" svg:height="0.64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frame draw:id="id6" presentation:style-name="a266" draw:name="Google Shape;3;n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7" presentation:style-name="a269" draw:name="Google Shape;4;n" svg:x="4.24826in" svg:y="0in" svg:width="3.25in" svg:height="0.50174in" presentation:class="date-time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70" draw:name="Google Shape;5;n">
          <svg:title/>
          <svg:desc/>
        </draw:page-thumbnail>
        <draw:frame draw:id="id9" presentation:style-name="a273" draw:name="Google Shape;6;n" svg:x="0.75in" svg:y="4.8125in" svg:width="6in" svg:height="3.9375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0" presentation:style-name="a276" draw:name="Google Shape;7;n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1" presentation:style-name="a279" draw:name="Google Shape;8;n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blank-BLANK" style:page-layout-name="pageLayout1" draw:style-name="a281">
      <draw:custom-shape svg:x="12.35in" svg:y="0in" svg:width="1in" svg:height="7.5in" draw:id="id47" draw:layer="Master2-bg" draw:style-name="a284" draw:name="Google Shape;24;p3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87" draw:transform="translate(-1.95833in -0.19965in) rotate(-4.71239) translate(12.85003in 4.62497in)" draw:name="Google Shape;73;p10" svg:width="3.91667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9" presentation:style-name="a290" draw:name="Google Shape;74;p10" svg:x="12.35in" svg:y="6.75001in" svg:width="1in" svg:height="0.64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frame draw:id="id6" presentation:style-name="a293" draw:name="Google Shape;3;n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7" presentation:style-name="a296" draw:name="Google Shape;4;n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7" draw:name="Google Shape;5;n">
          <svg:title/>
          <svg:desc/>
        </draw:page-thumbnail>
        <draw:frame draw:id="id9" presentation:style-name="a300" draw:name="Google Shape;6;n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Google Shape;7;n" svg:x="0in" svg:y="9.49826in" svg:width="3.25in" svg:height="0.50174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1" presentation:style-name="a306" draw:name="Google Shape;8;n" svg:x="4.24826in" svg:y="9.49826in" svg:width="3.25in" svg:height="0.50174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objTx-OBJECT_WITH_CAPTION_TEXT" style:page-layout-name="pageLayout1" draw:style-name="a308">
      <draw:custom-shape svg:x="12.35in" svg:y="0in" svg:width="1in" svg:height="7.5in" draw:id="id50" draw:layer="Master2-bg" draw:style-name="a311" draw:name="Google Shape;24;p3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15" draw:name="Google Shape;77;p11" svg:x="4.92593in" svg:y="0.75in" svg:width="6.64815in" svg:height="6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/></text:p>
            </text:list-item>
          </text:list>
        </draw:text-box>
        <svg:title/>
        <svg:desc/>
      </draw:frame>
      <draw:frame draw:id="id52" presentation:style-name="a318" draw:name="Google Shape;78;p11" svg:x="0.92in" svg:y="2.2963in" svg:width="3.5in" svg:height="4.16667in" presentation:class="object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3" presentation:style-name="a321" draw:transform="translate(-1.04166in -0.19965in) rotate(-4.71239) translate(12.85004in 1.29166in)" draw:name="Google Shape;79;p11" svg:width="2.08333in" svg:height="0.39931in" presentation:class="date-time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4" presentation:style-name="a324" draw:transform="translate(-1.95833in -0.19965in) rotate(-4.71239) translate(12.85003in 4.62497in)" draw:name="Google Shape;80;p11" svg:width="3.91667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5" presentation:style-name="a327" draw:name="Google Shape;81;p11" svg:x="12.35in" svg:y="6.75001in" svg:width="1in" svg:height="0.64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  <presentation:notes style:page-layout-name="pageLayout2" draw:style-name="a344">
        <draw:frame draw:id="id6" presentation:style-name="a330" draw:name="Google Shape;3;n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Google Shape;4;n" svg:x="4.24826in" svg:y="0in" svg:width="3.25in" svg:height="0.50174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34" draw:name="Google Shape;5;n">
          <svg:title/>
          <svg:desc/>
        </draw:page-thumbnail>
        <draw:frame draw:id="id9" presentation:style-name="a337" draw:name="Google Shape;6;n" svg:x="0.75in" svg:y="4.8125in" svg:width="6in" svg:height="3.9375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Google Shape;7;n" svg:x="0in" svg:y="9.49826in" svg:width="3.25in" svg:height="0.50174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1" presentation:style-name="a343" draw:name="Google Shape;8;n" svg:x="4.24826in" svg:y="9.49826in" svg:width="3.25in" svg:height="0.50174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picTx-PICTURE_WITH_CAPTION_TEXT" style:page-layout-name="pageLayout1" draw:style-name="a345">
      <draw:custom-shape svg:x="12.35in" svg:y="0in" svg:width="1in" svg:height="7.5in" draw:id="id56" draw:layer="Master2-bg" draw:style-name="a348" draw:name="Google Shape;24;p3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351" draw:name="Google Shape;84;p12" svg:x="1in" svg:y="5.75in" svg:width="10.91667in" svg:height="1in" presentation:class="titl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8" presentation:style-name="a355" draw:name="Google Shape;86;p12" svg:x="1in" svg:y="6.68044in" svg:width="10.91667in" svg:height="0.652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</draw:text-box>
        <svg:title/>
        <svg:desc/>
      </draw:frame>
      <draw:frame draw:id="id59" presentation:style-name="a358" draw:transform="translate(-1.04166in -0.19965in) rotate(-4.71239) translate(12.85004in 1.29166in)" draw:name="Google Shape;87;p12" svg:width="2.08333in" svg:height="0.39931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0" presentation:style-name="a361" draw:transform="translate(-1.95833in -0.19965in) rotate(-4.71239) translate(12.85003in 4.62497in)" draw:name="Google Shape;88;p12" svg:width="3.91667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1" presentation:style-name="a364" draw:name="Google Shape;89;p12" svg:x="12.35in" svg:y="6.75001in" svg:width="1in" svg:height="0.64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frame draw:id="id6" presentation:style-name="a367" draw:name="Google Shape;3;n" svg:x="0in" svg:y="0in" svg:width="3.25in" svg:height="0.50174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7" presentation:style-name="a370" draw:name="Google Shape;4;n" svg:x="4.24826in" svg:y="0in" svg:width="3.25in" svg:height="0.50174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71" draw:name="Google Shape;5;n">
          <svg:title/>
          <svg:desc/>
        </draw:page-thumbnail>
        <draw:frame draw:id="id9" presentation:style-name="a374" draw:name="Google Shape;6;n" svg:x="0.75in" svg:y="4.8125in" svg:width="6in" svg:height="3.9375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0" presentation:style-name="a377" draw:name="Google Shape;7;n" svg:x="0in" svg:y="9.49826in" svg:width="3.25in" svg:height="0.50174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1" presentation:style-name="a380" draw:name="Google Shape;8;n" svg:x="4.24826in" svg:y="9.49826in" svg:width="3.25in" svg:height="0.50174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vertTx-VERTICAL_TEXT" style:page-layout-name="pageLayout1" draw:style-name="a382">
      <draw:custom-shape svg:x="12.35in" svg:y="0in" svg:width="1in" svg:height="7.5in" draw:id="id62" draw:layer="Master2-bg" draw:style-name="a385" draw:name="Google Shape;24;p3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389" draw:transform="translate(-2.37934in -4.7in) rotate(-1.5708) translate(6.08001in 4.37934in)" draw:name="Google Shape;92;p13" svg:width="4.75868in" svg:height="9.4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/></text:p>
            </text:list-item>
          </text:list>
        </draw:text-box>
        <svg:title/>
        <svg:desc/>
      </draw:frame>
      <draw:frame draw:id="id64" presentation:style-name="a392" draw:transform="translate(-1.04166in -0.19965in) rotate(-4.71239) translate(12.85004in 1.29166in)" draw:name="Google Shape;93;p13" svg:width="2.08333in" svg:height="0.39931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5" presentation:style-name="a395" draw:transform="translate(-1.95833in -0.19965in) rotate(-4.71239) translate(12.85003in 4.62497in)" draw:name="Google Shape;94;p13" svg:width="3.91667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66" presentation:style-name="a398" draw:name="Google Shape;95;p13" svg:x="12.35in" svg:y="6.75001in" svg:width="1in" svg:height="0.64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6" presentation:style-name="a401" draw:name="Google Shape;3;n" svg:x="0in" svg:y="0in" svg:width="3.25in" svg:height="0.50174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Google Shape;4;n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05" draw:name="Google Shape;5;n">
          <svg:title/>
          <svg:desc/>
        </draw:page-thumbnail>
        <draw:frame draw:id="id9" presentation:style-name="a408" draw:name="Google Shape;6;n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Google Shape;7;n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4" draw:name="Google Shape;8;n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vertTitleAndTx-VERTICAL_TITLE_AND_VERTICAL_TEXT" style:page-layout-name="pageLayout1" draw:style-name="a416">
      <draw:custom-shape svg:x="12.35in" svg:y="0in" svg:width="1in" svg:height="7.5in" draw:id="id67" draw:layer="Master2-bg" draw:style-name="a419" draw:name="Google Shape;24;p3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423" draw:transform="translate(-3.22482in -4.22916in) rotate(-1.5708) translate(5.06248in 3.64149in)" draw:name="Google Shape;98;p14" svg:width="6.44965in" svg:height="8.45833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/></text:p>
            </text:list-item>
          </text:list>
        </draw:text-box>
        <svg:title/>
        <svg:desc/>
      </draw:frame>
      <draw:frame draw:id="id69" presentation:style-name="a426" draw:transform="translate(-1.04166in -0.19965in) rotate(-4.71239) translate(12.85004in 1.29166in)" draw:name="Google Shape;99;p14" svg:width="2.08333in" svg:height="0.39931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70" presentation:style-name="a429" draw:transform="translate(-1.95833in -0.19965in) rotate(-4.71239) translate(12.85003in 4.62497in)" draw:name="Google Shape;100;p14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71" presentation:style-name="a432" draw:name="Google Shape;101;p14" svg:x="12.35in" svg:y="6.75001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6" presentation:style-name="a435" draw:name="Google Shape;3;n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Google Shape;4;n" svg:x="4.24826in" svg:y="0in" svg:width="3.25in" svg:height="0.50174in" presentation:class="date-time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9" draw:name="Google Shape;5;n">
          <svg:title/>
          <svg:desc/>
        </draw:page-thumbnail>
        <draw:frame draw:id="id9" presentation:style-name="a442" draw:name="Google Shape;6;n" svg:x="0.75in" svg:y="4.8125in" svg:width="6in" svg:height="3.9375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Google Shape;7;n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Google Shape;8;n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Ashar Naveed</dc:creator>
    <dc:date>2025-12-09T20:29:27Z</dc:date>
    <meta:editing-cycles>2</meta:editing-cycles>
    <meta:editing-duration>PT69S</meta:editing-duration>
    <meta:document-statistic meta:paragraph-count="224" meta:word-count="1314"/>
  </office:meta>
</office:document-meta>
</file>